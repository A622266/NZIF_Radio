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TableGrid" style:family="table" style:display-name="TableGrid">
      <style:table-properties style:width="17cm" table:align="margins"/>
    </style:style>
    <style:style style:name="TableCell" style:family="table-cell" style:display-name="TableCell">
      <style:table-cell-properties fo:border="0.5pt solid #AAAAAA" fo:padding="2pt"/>
    </style:style>
    <style:style style:name="TableCellHeader" style:family="table-cell" style:display-name="TableCellHeader">
      <style:table-cell-properties fo:border="0.5pt solid #AAAAAA" fo:padding="2pt" fo:background-color="#1F4E79"/>
    </style:style>
    <style:style style:name="TableCellCritical" style:family="table-cell" style:display-name="TableCellCritical">
      <style:table-cell-properties fo:border="0.5pt solid #AAAAAA" fo:padding="2pt" fo:background-color="#FCE4E4"/>
    </style:style>
    <style:style style:name="TableCellHigh" style:family="table-cell" style:display-name="TableCellHigh">
      <style:table-cell-properties fo:border="0.5pt solid #AAAAAA" fo:padding="2pt" fo:background-color="#FFF2CC"/>
    </style:style>
    <style:style style:name="TableCellNew" style:family="table-cell" style:display-name="TableCellNew">
      <style:table-cell-properties fo:border="0.5pt solid #AAAAAA" fo:padding="2pt" fo:background-color="#EFE6FF"/>
    </style:style>
    <style:style style:name="Col2.0cm" style:family="table-column" style:display-name="Col2.0cm">
      <style:table-column-properties style:column-width="2.0cm"/>
    </style:style>
    <style:style style:name="Col2.5cm" style:family="table-column" style:display-name="Col2.5cm">
      <style:table-column-properties style:column-width="2.5cm"/>
    </style:style>
    <style:style style:name="Col7.5cm" style:family="table-column" style:display-name="Col7.5cm">
      <style:table-column-properties style:column-width="7.5cm"/>
    </style:style>
    <style:style style:name="Col5.0cm" style:family="table-column" style:display-name="Col5.0cm">
      <style:table-column-properties style:column-width="5.0cm"/>
    </style:style>
    <style:style style:name="Col5.5cm" style:family="table-column" style:display-name="Col5.5cm">
      <style:table-column-properties style:column-width="5.5cm"/>
    </style:style>
    <style:style style:name="Col4.0cm" style:family="table-column" style:display-name="Col4.0cm">
      <style:table-column-properties style:column-width="4.0cm"/>
    </style:style>
    <style:style style:name="Col7.0cm" style:family="table-column" style:display-name="Col7.0cm">
      <style:table-column-properties style:column-width="7.0cm"/>
    </style:style>
    <style:style style:name="Col3.0cm" style:family="table-column" style:display-name="Col3.0cm">
      <style:table-column-properties style:column-width="3.0cm"/>
    </style:style>
    <style:style style:name="Col14.0cm" style:family="table-column" style:display-name="Col14.0cm">
      <style:table-column-properties style:column-width="14.0cm"/>
    </style:style>
    <style:style style:name="Col1.2cm" style:family="table-column" style:display-name="Col1.2cm">
      <style:table-column-properties style:column-width="1.2cm"/>
    </style:style>
    <style:style style:name="Col9.0cm" style:family="table-column" style:display-name="Col9.0cm">
      <style:table-column-properties style:column-width="9.0cm"/>
    </style:style>
    <style:style style:name="Col1.8cm" style:family="table-column" style:display-name="Col1.8cm">
      <style:table-column-properties style:column-width="1.8cm"/>
    </style:style>
  </office:automatic-styles>
  <office:body>
    <office:text>
      <text:p text:style-name="Title">NZIF Radio — System Architecture &amp; Full Schematic Review</text:p>
      <text:p text:style-name="Subtitle">Review Date: 2026-06-06 (corrected 2026-06-07) | Scope: All schematic sheets, mixer-to-DSP core | Status: HOLD — Critical items block layout freeze</text:p>
      <text:p text:style-name="Body Text"><text:span text:style-name="New">Correction note (2026-06-07): </text:span>Three Critical findings and related action items from the original 2026-06-06 draft claimed that custom power-rail symbols (e.g. −3.5V_RX_OPAMPS, +6.5V_RX_OPAMPS, +3.3V_CONVERTERS) were wired to the wrong global net because their lib_id did not match their displayed Value. This was verified empirically to be a false positive: kicad-cli netlist export from the actual schematic files shows each custom-labelled symbol creates its own correctly isolated net, named after its Value text. In KiCad, a power symbol's Value field — not its lib_id — determines the net it joins; overriding the Value on a generic power symbol is the standard, documented way to create custom rail labels. The three findings (previously Critical 1, 8, 9) and their associated action items (previously T1-1, T1-8, T1-9) have been removed; remaining items renumbered accordingly. 

A second finding — 'ADA4945-1 feedback caps all DNP → device will oscillate' — was also revisited at the designer's request. The ADA4945-1 datasheet (held in this repo at nzif/docs/datasheets/precision/ada4945-1.pdf) describes the standard feedback topology as a purely resistive four-resistor RF/RG network, shows its own gain-of-1 ADC-driving application circuit with no feedback capacitor, and never mentions oscillation or instability risk anywhere in 57 pages. These 180 pF parts are optional output-filter provisions, by design left DNP unless additional anti-aliasing filtering ahead of the ADC is wanted — exactly as the designer described. This finding has been downgraded from HIGH to a documentation note (previously Tier 2 item T2-2, now reworded to recommend annotating intent rather than populating the parts).

A third finding — 'R701 = 1kΩ on OSC_CTRL; total load 11kΩ, below the AD9523-1's 20kΩ minimum' — was checked against the actual netlist and both datasheets at the designer's prompt ('can I just change R701 to be 20k?'). The underlying concern is real, but the original finding misattributed the '10 kΩ' term in its math to an 'internal' resistance on the AD9523-1 OSC_CTRL pin — no such figure exists anywhere in that datasheet (only unrelated 40 kΩ pull-ups/pull-downs on CS, RESET, SYNC, and similar digital pins). kicad-cli netlist export shows R701 is wired in series between AD9523-1 pin 8 (OSC_CTRL) and U7 (ABLNO-VCXO) pin 1 (Vc, the tuning-voltage input); the ABLNO datasheet (nzif/docs/datasheets/clocks/ABLNO.pdf) lists 'Control Voltage Port Impedance: 10 kΩ' for that very pin. So the 10 kΩ is real, and the series-sum math (R701 + VCXO Vc impedance) is the right model — it is simply the VCXO's input impedance, not an AD9523-1 internal resistance. At R701 = 1 kΩ the total load is 11 kΩ, short of the AD9523-1's documented 'RLOAD &gt; 20 kΩ' condition (Table 5) for guaranteed OSC_CTRL output-low levels. The designer's proposed fix — R701 = 20 kΩ — is correct and is actually better than this report's original T1-4 recommendation of '≥10 kΩ': 20 kΩ + 10 kΩ = 30 kΩ clears the spec with ~50% margin, whereas 10 kΩ would land exactly on the 20 kΩ boundary of a strict '&gt;' inequality, with none. The finding's wording and the T1-4 action item have been corrected accordingly; the 'radio is inoperable' framing has also been softened to 'restricted VCXO tuning range / marginal PLL1 lock,' which better matches what an under-spec RLOAD condition actually does to a buffered control-voltage output (reduced swing/range) rather than an absolute failure.</text:p>
      <text:h text:outline-level="1" text:style-name="Heading 1">1. Executive Summary</text:h>
      <text:p text:style-name="Body Text">This review covers the complete NZIF Radio schematic at the mixer-to-DSP level. Six domain expert reviews were conducted in parallel across all twelve schematic sheets. The design represents a genuinely novel 8-phase near-zero-IF architecture that is publishable in principle. However, the schematic has <text:span text:style-name="Critical">8 Critical</text:span> issues, <text:span text:style-name="High">25+ High</text:span> issues, and numerous Moderate findings that must be resolved before layout or fabrication. Hardware does not yet exist; all performance figures are theoretical estimates requiring bring-up validation.</text:p>
      <text:p text:style-name="Body Text"><text:span text:style-name="Bold">QST Verdict: </text:span>The architecture deserves a QST article. The execution needs a complete schematic correction pass before that becomes possible. The minimum viable path to a working prototype requires resolution of all Tier 1 critical items listed in Section 6.</text:p>
      <text:h text:outline-level="2" text:style-name="Heading 2">1.1 Top Critical Issues — Must Fix Before Layout</text:h>
      <table:table table:style-name="TableGrid">
        <table:table-column table:style-name="Col2.0cm"/>
        <table:table-column table:style-name="Col2.5cm"/>
        <table:table-column table:style-name="Col7.5cm"/>
        <table:table-column table:style-name="Col5.0cm"/>
        <table:table-row>
          <table:table-cell table:style-name="TableCellHeader" office:value-type="string">
            <text:p text:style-name="TableHeaderPara">#</text:p>
          </table:table-cell>
          <table:table-cell table:style-name="TableCellHeader" office:value-type="string">
            <text:p text:style-name="TableHeaderPara">Sheet</text:p>
          </table:table-cell>
          <table:table-cell table:style-name="TableCellHeader" office:value-type="string">
            <text:p text:style-name="TableHeaderPara">Issue</text:p>
          </table:table-cell>
          <table:table-cell table:style-name="TableCellHeader" office:value-type="string">
            <text:p text:style-name="TableHeaderPara">Risk</text:p>
          </table:table-cell>
        </table:table-row>
        <table:table-row>
          <table:table-cell table:style-name="TableCellCritical" office:value-type="string">
            <text:p text:style-name="TablePara">CRITICAL 1</text:p>
          </table:table-cell>
          <table:table-cell table:style-name="TableCell" office:value-type="string">
            <text:p text:style-name="TablePara">power_ldos</text:p>
          </table:table-cell>
          <table:table-cell table:style-name="TableCell" office:value-type="string">
            <text:p text:style-name="TablePara">R903/R907/R908/R909 missing 'k' suffix</text:p>
            <text:p text:style-name="TablePara">(49.9 Ω not 49.9 kΩ)</text:p>
          </table:table-cell>
          <table:table-cell table:style-name="TableCell" office:value-type="string">
            <text:p text:style-name="TablePara">All four LDO rails produce ~5 mV;</text:p>
            <text:p text:style-name="TablePara">complete subsystem failure</text:p>
          </table:table-cell>
        </table:table-row>
        <table:table-row>
          <table:table-cell table:style-name="TableCellCritical" office:value-type="string">
            <text:p text:style-name="TablePara">CRITICAL 2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LT8330 feedback R1101/R1102 wrong values</text:p>
            <text:p text:style-name="TablePara">(produces −1.79V not −5V)</text:p>
          </table:table-cell>
          <table:table-cell table:style-name="TableCell" office:value-type="string">
            <text:p text:style-name="TablePara">−5V rail absent;</text:p>
            <text:p text:style-name="TablePara">analog op-amp supply fails</text:p>
          </table:table-cell>
        </table:table-row>
        <table:table-row>
          <table:table-cell table:style-name="TableCellCritical" office:value-type="string">
            <text:p text:style-name="TablePara">CRITICAL 3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ADP2303 R1103/R1104 wrong values</text:p>
            <text:p text:style-name="TablePara">(1.6V not target voltage)</text:p>
          </table:table-cell>
          <table:table-cell table:style-name="TableCell" office:value-type="string">
            <text:p text:style-name="TablePara">Target rail at wrong voltage;</text:p>
            <text:p text:style-name="TablePara">dependent LDOs receive wrong input</text:p>
          </table:table-cell>
        </table:table-row>
        <table:table-row>
          <table:table-cell table:style-name="TableCellCritical" office:value-type="string">
            <text:p text:style-name="TablePara">CRITICAL 4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R701 = 1 kΩ in series with VCXO Vc input</text:p>
            <text:p text:style-name="TablePara">(10 kΩ); total 11 kΩ load on OSC_CTRL,</text:p>
            <text:p text:style-name="TablePara">below AD9523-1's 20 kΩ minimum</text:p>
          </table:table-cell>
          <table:table-cell table:style-name="TableCell" office:value-type="string">
            <text:p text:style-name="TablePara">Restricted VCXO tuning range;</text:p>
            <text:p text:style-name="TablePara">marginal PLL1 lock acquisition</text:p>
          </table:table-cell>
        </table:table-row>
        <table:table-row>
          <table:table-cell table:style-name="TableCellCritical" office:value-type="string">
            <text:p text:style-name="TablePara">CRITICAL 5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U706 symbol=SN74CBT3253 (5V)</text:p>
            <text:p text:style-name="TablePara">vs. Value=SN74CBTLV3253 (3.6V max)</text:p>
          </table:table-cell>
          <table:table-cell table:style-name="TableCell" office:value-type="string">
            <text:p text:style-name="TablePara">Wrong device assembled;</text:p>
            <text:p text:style-name="TablePara">3.6V-max part destroyed at 5V supply</text:p>
          </table:table-cell>
        </table:table-row>
        <table:table-row>
          <table:table-cell table:style-name="TableCellCritical" office:value-type="string">
            <text:p text:style-name="TablePara">CRITICAL 6</text:p>
          </table:table-cell>
          <table:table-cell table:style-name="TableCell" office:value-type="string">
            <text:p text:style-name="TablePara">dacs</text:p>
          </table:table-cell>
          <table:table-cell table:style-name="TableCell" office:value-type="string">
            <text:p text:style-name="TablePara">ADAU1962A AVDD driven from Q601 emitter</text:p>
            <text:p text:style-name="TablePara">follower: ~2.7V vs. 3.0V minimum</text:p>
          </table:table-cell>
          <table:table-cell table:style-name="TableCell" office:value-type="string">
            <text:p text:style-name="TablePara">DAC internal references out of spec;</text:p>
            <text:p text:style-name="TablePara">possible startup failure</text:p>
          </table:table-cell>
        </table:table-row>
        <table:table-row>
          <table:table-cell table:style-name="TableCellCritical" office:value-type="string">
            <text:p text:style-name="TablePara">CRITICAL 7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Net label 'DVDOUT' should be 'DVDDOUT';</text:p>
            <text:p text:style-name="TablePara">ADAU1361 internal LDO decoupling disconnected</text:p>
          </table:table-cell>
          <table:table-cell table:style-name="TableCell" office:value-type="string">
            <text:p text:style-name="TablePara">Codec internal digital supply unstable;</text:p>
            <text:p text:style-name="TablePara">codec non-functional</text:p>
          </table:table-cell>
        </table:table-row>
        <table:table-row>
          <table:table-cell table:style-name="TableCellCritical" office:value-type="string">
            <text:p text:style-name="TablePara">CRITICAL 8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ADAU1979 PLL_FILT cap C406 (5600 pF)</text:p>
            <text:p text:style-name="TablePara">marked DNP [NEW]</text:p>
          </table:table-cell>
          <table:table-cell table:style-name="TableCell" office:value-type="string">
            <text:p text:style-name="TablePara">ADC internal PLL cannot lock;</text:p>
            <text:p text:style-name="TablePara">ADU1979 completely non-functional</text:p>
          </table:table-cell>
        </table:table-row>
      </table:table>
      <text:p text:style-name="Body Text"/>
      <text:h text:outline-level="1" text:style-name="Heading 1">2. System Architecture Assessment</text:h>
      <text:h text:outline-level="2" text:style-name="Heading 2">2.1 Architecture Strengths</text:h>
      <text:p text:style-name="Body Text"><text:span text:style-name="Bold">8-Phase Polyphase Mixer — Genuine Novelty: </text:span>The 8-phase commutating topology with SN74CBT3125C bus switches provides theoretical &gt;60 dB rejection of the 3rd LO harmonic, &gt;50 dB of the 5th, and &gt;45 dB of the 7th. No published amateur construction project has implemented this. The mathematics (8-point DFT phasor argument) is correct and is validated by the rxmixer.md simulation showing correct 45° phase spacing and matched amplitudes. This directly surpasses Tayloe's 4-phase detector (QEX, May 2001) and is the primary novelty claim for a QST article.</text:p>
      <text:p text:style-name="Body Text"><text:span text:style-name="Bold">AD9523-1 Dual-Output Clock Architecture: </text:span>Generating both the variable RF LO and the fixed audio MCLK from a single VCO, with the reference-path divider completely decoupled from PLL2 tuning, is architecturally elegant. Retuning the LO does not disturb the I2S clock domain — a non-trivial design insight that most amateur SDR designs get wrong. The AD9523-1's −226 dBc/Hz FOM is appropriate for a receiver targeting superheterodyne-class phase noise performance.</text:p>
      <text:p text:style-name="Body Text"><text:span text:style-name="Bold">Ring Counter Phase Generation: </text:span>The SN74AUC16374 ring counter producing eight non-overlapping phase pulses from a circulating single-bit shift register is original and elegant. The 4:1 mux initialisation sequence (clear → seed → run) reproducibly places exactly one '1' in the loop, solving the undefined power-up state problem without external reset logic. The 2.5V supply choice allows 237.6 MHz operation for 10m (8-phase) within the 250 MHz typical device rating.</text:p>
      <text:p text:style-name="Body Text"><text:span text:style-name="Bold">Fully Differential Signal Flow: </text:span>The receive chain is fully differential from the balun secondary through SN74CBT3125C switches → ADA4625-2 buffers → ADA4945-1 FDAs → ADAU1979 ADC. Maintaining differential mode throughout suppresses even-order nonlinearities and rejects common-mode RF interference. The LT5400 matched quad resistors for ADA4945-1 Rg positions (0.01% ratio matching, 0.5 ppm/°C tracking) are the right call for I/Q amplitude balance.</text:p>
      <text:p text:style-name="Body Text"><text:span text:style-name="Bold">Near-Zero-IF + NCO Strategy: </text:span>The ADAU1467 digital NCO (±96 kHz) offsets the receive center from DC, avoiding LO leakage and 1/f noise without a switched IF filter bank. Combined with 100 kHz LO steps from the AD9523-1, this provides continuous HF coverage. The Weaver two-stage demodulation (first stage: analog 8-phase mixer; second stage: digital NCO in ADAU1467) is a legitimate and clean implementation.</text:p>
      <text:p text:style-name="Body Text"><text:span text:style-name="Bold">LT3045/LT3094 Power Architecture: </text:span>The use of ultra-low-noise LDOs (2 µVrms) post-regulating from ADP2302/ADP2303 switchers, with domain-isolated rails for the clock tree, mixers, and audio converters, reflects serious attention to the ADC noise floor. The LT3045's 76 dB PSRR at 1 MHz directly addresses 700 kHz switcher ripple. This is a publishable design decision that most commercial SDR kits do not implement.</text:p>
      <text:p text:style-name="Body Text"><text:span text:style-name="Bold">I/Q Calibration Architecture: </text:span>The directional coupler calibration tap + HMC1118 switch injecting a known spectrally clean signal into the receive path for runtime I/Q calibration goes beyond any published amateur receiver design. If implemented correctly, this allows image rejection to be maintained across temperature and band changes without manual trimming.</text:p>
      <text:p text:style-name="Body Text"><text:span text:style-name="Bold">ADAU1467 SigmaDSP Integration: </text:span>The 294 MHz dual-core ADAU1467 running SigmaStudio graphical blocks (NCO, Weaver second stage, FIR/IIR filters, AGC, I/Q correction matrix) provides more DSP headroom than a comparably priced FPGA for audio-rate processing, without requiring custom firmware. I2C parameter RAM access from the Pico enables runtime calibration coefficient updates.</text:p>
      <text:h text:outline-level="2" text:style-name="Heading 2">2.2 Architecture Concerns</text:h>
      <text:p text:style-name="Body Text"><text:span text:style-name="Bold">TX Reconstruction Filter Absent [CRITICAL]: </text:span>The tx_mixer.kicad_sch sheet title promises '16 Phase Tx Harmonic Mixer and Reconstruction Filter' but contains no filter components. DAC reconstruction images at LO ± 192 kHz and harmonics feed directly to the PA interface. The ZWAS LPF on the RF front-end board suppresses PA harmonics but not pre-PA mixer images. A fully differential LC filter at TX_RF+/TX_RF- is required before FCC Part 97 compliance can be claimed.</text:p>
      <text:p text:style-name="Body Text"><text:span text:style-name="Bold">Hold Capacitor Values Produce ~4 kHz Baseband Bandwidth [NEW HIGH]: </text:span>The rx_mixer annotation uses N=1 in the bandwidth equation; the correct value for an 8-phase topology is N=8. With 100 nF hold caps and Reff ≈ 50 Ω source / N=8: BW ≈ 1/(2π × 8 × 50 × 100 nF) ≈ 4 kHz. This is far below the ±96 kHz NCO range. For ±200 kHz bandwidth target: C_hold ≈ 2 nF. The current 100 nF caps limit the design to CW-only operation, inconsistent with the stated SSB/AM/digital mode goals.</text:p>
      <text:p text:style-name="Body Text"><text:span text:style-name="Bold">VCXO vs. TCXO Conflict [NEW HIGH]: </text:span>CLAUDE.md and the architecture description state CTS_535_TCXO as the frequency reference, but clock_tree.kicad_sch instantiates an ABLNO-V-VCXO. These are functionally different devices. The AD9523-1 is designed for a VCXO reference on PLL1 (OSC_CTRL drives Vc), which makes the ABLNO-VCXO the architecturally correct choice — but the documentation and schematic disagree. This must be resolved explicitly.</text:p>
      <text:p text:style-name="Body Text"><text:span text:style-name="Bold">6m 4-Phase Mode Spurious Response: </text:span>In 4-phase mode (6m), the 5th harmonic (f_LO/5 ≈ 10–10.8 MHz = 30m band) passes through with the same response vector as the fundamental. HP-2 (9 MHz cutoff) provides only modest attenuation at 10 MHz. Strong 30m signals will create interference on 6m. This limitation is inherent to 4-phase operation and should be quantified and disclosed in any QST article.</text:p>
      <text:p text:style-name="Body Text"><text:span text:style-name="Bold">Power Sequencing Undefined: </text:span>No PGOOD connections link switching regulator outputs to downstream LDO enable pins. The ADAU1467 requires DVDD and IOVDD within 0.3 V of each other during power-up to prevent latch-up. All rails currently rise simultaneously with no defined order. ADP2303 PGOOD pins have no pull-up resistors.</text:p>
      <text:h text:outline-level="2" text:style-name="Heading 2">2.3 QST Readiness Assessment</text:h>
      <text:p text:style-name="Body Text"><text:span text:style-name="Bold">Strengths for publication: </text:span>The 8-phase polyphase mixer topology is a publishable concept that advances the state of amateur radio construction. The dual-path clock architecture, ring counter phase generation, and I/Q calibration system are all novel and technically rigorous. The LTspice simulation validating the 45° phase spacing is a publication-ready figure. A QST reviewer familiar with Tayloe's detector would immediately recognise this as a significant advancement.</text:p>
      <text:p text:style-name="Body Text"><text:span text:style-name="Bold">Blockers to publication: </text:span>(1) 8 critical schematic errors that would prevent a built board from functioning. (2) No hardware exists — all performance figures are theoretical estimates. QST requires bench-measured data for all performance claims. (3) TX reconstruction filter absent — transmitter cannot claim Part 97 compliance. (4) Hold capacitor values inconsistent with stated ±96 kHz operating bandwidth.</text:p>
      <text:p text:style-name="Body Text"><text:span text:style-name="Bold">Recommended path to QST submission: </text:span>Fix all Tier 1 critical items → build first prototype → measure MDS, IIP3, harmonic rejection (3rd/5th/7th), image rejection, and TX spectrum → submit with measured data and corrected ERC-clean schematic.</text:p>
      <text:h text:outline-level="1" text:style-name="Heading 1">3. New Findings — This Review Cycle</text:h>
      <text:p text:style-name="Body Text">The following issues were not in the prior schematic_review_report.md and were identified by this review cycle:</text:p>
      <table:table table:style-name="TableGrid">
        <table:table-column table:style-name="Col2.5cm"/>
        <table:table-column table:style-name="Col2.5cm"/>
        <table:table-column table:style-name="Col2.5cm"/>
        <table:table-column table:style-name="Col5.5cm"/>
        <table:table-column table:style-name="Col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Sheet</text:p>
          </table:table-cell>
          <table:table-cell table:style-name="TableCellHeader" office:value-type="string">
            <text:p text:style-name="TableHeaderPara">Ref/Net</text:p>
          </table:table-cell>
          <table:table-cell table:style-name="TableCellHeader" office:value-type="string">
            <text:p text:style-name="TableHeaderPara">Issue</text:p>
          </table:table-cell>
          <table:table-cell table:style-name="TableCellHeader" office:value-type="string">
            <text:p text:style-name="TableHeaderPara">Action</text:p>
          </table:table-cell>
        </table:table-row>
        <table:table-row>
          <table:table-cell table:style-name="TableCellCritical" office:value-type="string">
            <text:p text:style-name="TablePara">CRITICAL [NEW]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C406</text:p>
            <text:p text:style-name="TablePara">(PLL_FILT)</text:p>
          </table:table-cell>
          <table:table-cell table:style-name="TableCell" office:value-type="string">
            <text:p text:style-name="TablePara">5600 pF PLL_FILT cap is marked DNP.</text:p>
            <text:p text:style-name="TablePara">ADAU1979 internal PLL cannot lock</text:p>
            <text:p text:style-name="TablePara">without this capacitor → ADC non-functional</text:p>
          </table:table-cell>
          <table:table-cell table:style-name="TableCell" office:value-type="string">
            <text:p text:style-name="TablePara">Populate C406; do not DNP on prototype</text:p>
          </table:table-cell>
        </table:table-row>
        <table:table-row>
          <table:table-cell table:style-name="TableCellCritical" office:value-type="string">
            <text:p text:style-name="TablePara">CRITICAL [NEW]</text:p>
          </table:table-cell>
          <table:table-cell table:style-name="TableCell" office:value-type="string">
            <text:p text:style-name="TablePara">dacs</text:p>
          </table:table-cell>
          <table:table-cell table:style-name="TableCell" office:value-type="string">
            <text:p text:style-name="TablePara">Net '2.5'</text:p>
            <text:p text:style-name="TablePara">(no V suffix)</text:p>
          </table:table-cell>
          <table:table-cell table:style-name="TableCell" office:value-type="string">
            <text:p text:style-name="TablePara">Label '2.5' (missing 'V') at line 6617 creates</text:p>
            <text:p text:style-name="TablePara">a net isolated from all '2.5V' nets.</text:p>
            <text:p text:style-name="TablePara">Floating node risk at DAC reference</text:p>
          </table:table-cell>
          <table:table-cell table:style-name="TableCell" office:value-type="string">
            <text:p text:style-name="TablePara">Rename to '2.5V'; verify no other</text:p>
            <text:p text:style-name="TablePara">case/suffix mismatches in DAC sheet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X701 vs</text:p>
            <text:p text:style-name="TablePara">ABLNO-VCXO</text:p>
          </table:table-cell>
          <table:table-cell table:style-name="TableCell" office:value-type="string">
            <text:p text:style-name="TablePara">Architecture docs say CTS_535_TCXO;</text:p>
            <text:p text:style-name="TablePara">schematic instantiates ABLNO-V-VCXO.</text:p>
            <text:p text:style-name="TablePara">Fundamentally different parts (TCXO vs VCXO)</text:p>
          </table:table-cell>
          <table:table-cell table:style-name="TableCell" office:value-type="string">
            <text:p text:style-name="TablePara">Commit to ABLNO-VCXO (architecturally</text:p>
            <text:p text:style-name="TablePara">correct for AD9523-1 PLL1); update</text:p>
            <text:p text:style-name="TablePara">CLAUDE.md; remove unused CTS_535 symbol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rx_mixer</text:p>
          </table:table-cell>
          <table:table-cell table:style-name="TableCell" office:value-type="string">
            <text:p text:style-name="TablePara">HC_201–208</text:p>
            <text:p text:style-name="TablePara">hold caps</text:p>
          </table:table-cell>
          <table:table-cell table:style-name="TableCell" office:value-type="string">
            <text:p text:style-name="TablePara">Bandwidth annotation uses N=1 but topology</text:p>
            <text:p text:style-name="TablePara">has N=8 phases. Correct BW with 100 nF:</text:p>
            <text:p text:style-name="TablePara">~4 kHz, not 96 kHz. Inconsistent with</text:p>
            <text:p text:style-name="TablePara">±96 kHz NCO design goal</text:p>
          </table:table-cell>
          <table:table-cell table:style-name="TableCell" office:value-type="string">
            <text:p text:style-name="TablePara">Recalculate for N=8: C_hold ≈ 2 nF</text:p>
            <text:p text:style-name="TablePara">for 200 kHz target BW; update annotation</text:p>
            <text:p text:style-name="TablePara">and fitted values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U401 VREF</text:p>
            <text:p text:style-name="TablePara">buffer</text:p>
          </table:table-cell>
          <table:table-cell table:style-name="TableCell" office:value-type="string">
            <text:p text:style-name="TablePara">R410 (3kΩ) loads ADAU1979 VREF pin</text:p>
            <text:p text:style-name="TablePara">(unbuffered bandgap output) with 0.83 mA</text:p>
            <text:p text:style-name="TablePara">before the ADA4807-1 buffer — exceeds</text:p>
            <text:p text:style-name="TablePara">recommended loading</text:p>
          </table:table-cell>
          <table:table-cell table:style-name="TableCell" office:value-type="string">
            <text:p text:style-name="TablePara">Move R410 to output of ADA4807-1</text:p>
            <text:p text:style-name="TablePara">buffer, not input; ensure VREF pin</text:p>
            <text:p text:style-name="TablePara">sees only buffer input impedance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C401, C403</text:p>
            <text:p text:style-name="TablePara">AVDD caps</text:p>
          </table:table-cell>
          <table:table-cell table:style-name="TableCell" office:value-type="string">
            <text:p text:style-name="TablePara">10 µF AVDD bypass caps assigned to</text:p>
            <text:p text:style-name="TablePara">0402 footprint. DC bias derating at 3.3V</text:p>
            <text:p text:style-name="TablePara">reduces effective C to 3–5 µF (marginal).</text:p>
            <text:p text:style-name="TablePara">No 10 µF ceramic exists in 1005 metric</text:p>
          </table:table-cell>
          <table:table-cell table:style-name="TableCell" office:value-type="string">
            <text:p text:style-name="TablePara">Change footprint to 0805; use 10 µF</text:p>
            <text:p text:style-name="TablePara">X5R/X7R 0805 rated ≥6.3V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dacs</text:p>
          </table:table-cell>
          <table:table-cell table:style-name="TableCell" office:value-type="string">
            <text:p text:style-name="TablePara">Q601 / AVDD</text:p>
          </table:table-cell>
          <table:table-cell table:style-name="TableCell" office:value-type="string">
            <text:p text:style-name="TablePara">FZT951TA emitter follower produces</text:p>
            <text:p text:style-name="TablePara">~3.3V − 0.6V = 2.7V AVDD at room temp.</text:p>
            <text:p text:style-name="TablePara">Falls further with temperature.</text:p>
            <text:p text:style-name="TablePara">ADAU1962A AVDD minimum is 3.0V</text:p>
          </table:table-cell>
          <table:table-cell table:style-name="TableCell" office:value-type="string">
            <text:p text:style-name="TablePara">Replace Q601 with LT3045 LDO;</text:p>
            <text:p text:style-name="TablePara">set output to 3.3V with correct</text:p>
            <text:p text:style-name="TablePara">SET resistor value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SELFBOOT /</text:p>
            <text:p text:style-name="TablePara">U502 EEPROM</text:p>
          </table:table-cell>
          <table:table-cell table:style-name="TableCell" office:value-type="string">
            <text:p text:style-name="TablePara">SELFBOOT pin state unconfirmed.</text:p>
            <text:p text:style-name="TablePara">U502 (25AA1024 SPI EEPROM) footprint</text:p>
            <text:p text:style-name="TablePara">is empty — absent from layout.</text:p>
            <text:p text:style-name="TablePara">Self-boot path cannot function without EEPROM</text:p>
          </table:table-cell>
          <table:table-cell table:style-name="TableCell" office:value-type="string">
            <text:p text:style-name="TablePara">Assign footprint to U502; confirm</text:p>
            <text:p text:style-name="TablePara">SELFBOOT pulled high (IOVDD);</text:p>
            <text:p text:style-name="TablePara">document boot mode in schematic note</text:p>
          </table:table-cell>
        </table:table-row>
        <table:table-row>
          <table:table-cell table:style-name="TableCellHigh" office:value-type="string">
            <text:p text:style-name="TablePara">HIGH [NEW]</text:p>
          </table:table-cell>
          <table:table-cell table:style-name="TableCell" office:value-type="string">
            <text:p text:style-name="TablePara">tx_mixer</text:p>
          </table:table-cell>
          <table:table-cell table:style-name="TableCell" office:value-type="string">
            <text:p text:style-name="TablePara">Tx DAC</text:p>
            <text:p text:style-name="TablePara">differential</text:p>
            <text:p text:style-name="TablePara">polarity</text:p>
          </table:table-cell>
          <table:table-cell table:style-name="TableCell" office:value-type="string">
            <text:p text:style-name="TablePara">DAC_N+/DAC_N− assignment to switch</text:p>
            <text:p text:style-name="TablePara">port A vs. B not verified. Any polarity</text:p>
            <text:p text:style-name="TablePara">reversal injects image/sideband rather</text:p>
            <text:p text:style-name="TablePara">than desired signal</text:p>
          </table:table-cell>
          <table:table-cell table:style-name="TableCell" office:value-type="string">
            <text:p text:style-name="TablePara">Trace each DAC± to switch port;</text:p>
            <text:p text:style-name="TablePara">annotate polarity on schematic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MiSO_M</text:p>
            <text:p text:style-name="TablePara">label</text:p>
          </table:table-cell>
          <table:table-cell table:style-name="TableCell" office:value-type="string">
            <text:p text:style-name="TablePara">Label 'MiSO_M' (mixed case) creates</text:p>
            <text:p text:style-name="TablePara">a separate net from 'MISO_M' (all caps).</text:p>
            <text:p text:style-name="TablePara">KiCad net names are case-sensitive.</text:p>
            <text:p text:style-name="TablePara">ADAU1467 SPI EEPROM read path broken</text:p>
          </table:table-cell>
          <table:table-cell table:style-name="TableCell" office:value-type="string">
            <text:p text:style-name="TablePara">Change 'MiSO_M' to 'MISO_M'</text:p>
            <text:p text:style-name="TablePara">throughout; verify with ERC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C1215/C1216</text:p>
            <text:p text:style-name="TablePara">footprint</text:p>
          </table:table-cell>
          <table:table-cell table:style-name="TableCell" office:value-type="string">
            <text:p text:style-name="TablePara">220 µF polarized electrolytic caps</text:p>
            <text:p text:style-name="TablePara">assigned to 0402 footprint (1.0×0.5 mm).</text:p>
            <text:p text:style-name="TablePara">No 220 µF ceramic exists in 0402.</text:p>
            <text:p text:style-name="TablePara">Assembly will fail</text:p>
          </table:table-cell>
          <table:table-cell table:style-name="TableCell" office:value-type="string">
            <text:p text:style-name="TablePara">Change to through-hole radial or</text:p>
            <text:p text:style-name="TablePara">large-body SMD electrolytic footprint;</text:p>
            <text:p text:style-name="TablePara">consider 470 µF for fc ≈ 11 Hz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tx_mixer</text:p>
            <text:p text:style-name="TablePara">clock_tree</text:p>
          </table:table-cell>
          <table:table-cell table:style-name="TableCell" office:value-type="string">
            <text:p text:style-name="TablePara">Clock net</text:p>
            <text:p text:style-name="TablePara">naming</text:p>
            <text:p text:style-name="TablePara">inconsistency</text:p>
          </table:table-cell>
          <table:table-cell table:style-name="TableCell" office:value-type="string">
            <text:p text:style-name="TablePara">clock_tree exports 'tx_phase_N';</text:p>
            <text:p text:style-name="TablePara">tx_mixer imports 'CLK_N';</text:p>
            <text:p text:style-name="TablePara">rx_mixer imports 'phase_N'.</text:p>
            <text:p text:style-name="TablePara">Three naming conventions for same signals</text:p>
          </table:table-cell>
          <table:table-cell table:style-name="TableCell" office:value-type="string">
            <text:p text:style-name="TablePara">Standardise on one naming scheme</text:p>
            <text:p text:style-name="TablePara">across all sheets; verify all</text:p>
            <text:p text:style-name="TablePara">hierarchical connections are intact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rx_driver_amps</text:p>
          </table:table-cell>
          <table:table-cell table:style-name="TableCell" office:value-type="string">
            <text:p text:style-name="TablePara">ADA4945-1</text:p>
            <text:p text:style-name="TablePara">VOCM pin</text:p>
          </table:table-cell>
          <table:table-cell table:style-name="TableCell" office:value-type="string">
            <text:p text:style-name="TablePara">VOCM pin not explicitly driven.</text:p>
            <text:p text:style-name="TablePara">Default VOCM = midpoint of supply rails</text:p>
            <text:p text:style-name="TablePara">(+6.5V/−3.5V) = +1.5V.</text:p>
            <text:p text:style-name="TablePara">ADAU1979 VOCM = AVDD/2 = 1.65V.</text:p>
            <text:p text:style-name="TablePara">Marginal match, supply-dependent</text:p>
          </table:table-cell>
          <table:table-cell table:style-name="TableCell" office:value-type="string">
            <text:p text:style-name="TablePara">Drive VOCM from resistor divider</text:p>
            <text:p text:style-name="TablePara">from ADAU1979 AVDD for stable</text:p>
            <text:p text:style-name="TablePara">common-mode matching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ADP2303 bulk</text:p>
            <text:p text:style-name="TablePara">caps</text:p>
          </table:table-cell>
          <table:table-cell table:style-name="TableCell" office:value-type="string">
            <text:p text:style-name="TablePara">Output bulk caps '47u 6.3V' —</text:p>
            <text:p text:style-name="TablePara">if used on 8V ADP2303 output</text:p>
            <text:p text:style-name="TablePara">(R1112/R1113), 6.3V rating exceeded</text:p>
          </table:table-cell>
          <table:table-cell table:style-name="TableCell" office:value-type="string">
            <text:p text:style-name="TablePara">Verify which caps are on 8V output;</text:p>
            <text:p text:style-name="TablePara">replace with 47µF 16V-rated parts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power_ldos</text:p>
          </table:table-cell>
          <table:table-cell table:style-name="TableCell" office:value-type="string">
            <text:p text:style-name="TablePara">C913/C917/C922</text:p>
            <text:p text:style-name="TablePara">'04.7u' notation</text:p>
          </table:table-cell>
          <table:table-cell table:style-name="TableCell" office:value-type="string">
            <text:p text:style-name="TablePara">'04.7u' value notation on SET bypass</text:p>
            <text:p text:style-name="TablePara">caps is ambiguous; BOM tools may parse</text:p>
            <text:p text:style-name="TablePara">as 4.7 µF or 0.47 µF — 10× difference</text:p>
            <text:p text:style-name="TablePara">affects LDO PSRR</text:p>
          </table:table-cell>
          <table:table-cell table:style-name="TableCell" office:value-type="string">
            <text:p text:style-name="TablePara">Change notation to '470n' (correct</text:p>
            <text:p text:style-name="TablePara">for SET pin bypass); or '4.7u' if</text:p>
            <text:p text:style-name="TablePara">bulk bypass is intended; confirm intent</text:p>
          </table:table-cell>
        </table:table-row>
        <table:table-row>
          <table:table-cell table:style-name="TableCellNew" office:value-type="string">
            <text:p text:style-name="TablePara">MODERATE [NEW]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ADAU1467</text:p>
            <text:p text:style-name="TablePara">per-pin</text:p>
            <text:p text:style-name="TablePara">decoupling</text:p>
          </table:table-cell>
          <table:table-cell table:style-name="TableCell" office:value-type="string">
            <text:p text:style-name="TablePara">ADAU1467 has 17 separate power pins</text:p>
            <text:p text:style-name="TablePara">across 4 supply domains. Schematic</text:p>
            <text:p text:style-name="TablePara">must verify one 100 nF cap per physical</text:p>
            <text:p text:style-name="TablePara">pin at 294 MHz core clock frequency</text:p>
          </table:table-cell>
          <table:table-cell table:style-name="TableCell" office:value-type="string">
            <text:p text:style-name="TablePara">Verify one decoupling cap per power</text:p>
            <text:p text:style-name="TablePara">pin on U501; ensure caps placed</text:p>
            <text:p text:style-name="TablePara">adjacent to each pin in layout</text:p>
          </table:table-cell>
        </table:table-row>
      </table:table>
      <text:p text:style-name="Body Text"/>
      <text:h text:outline-level="1" text:style-name="Heading 1">4. Status of Prior Review Issues</text:h>
      <text:p text:style-name="Body Text">All items from the April 2026 review report (schematic_review_report.md) were re-evaluated against the current schematic. The following table summarises status:</text:p>
      <table:table table:style-name="TableGrid">
        <table:table-column table:style-name="Col5.5cm"/>
        <table:table-column table:style-name="Col2.5cm"/>
        <table:table-column table:style-name="Col2.0cm"/>
        <table:table-column table:style-name="Col7.0cm"/>
        <table:table-row>
          <table:table-cell table:style-name="TableCellHeader" office:value-type="string">
            <text:p text:style-name="TableHeaderPara">Issue from Prior Report</text:p>
          </table:table-cell>
          <table:table-cell table:style-name="TableCellHeader" office:value-type="string">
            <text:p text:style-name="TableHeaderPara">Sheet</text:p>
          </table:table-cell>
          <table:table-cell table:style-name="TableCellHeader" office:value-type="string">
            <text:p text:style-name="TableHeaderPara">Prior Priority</text:p>
          </table:table-cell>
          <table:table-cell table:style-name="TableCellHeader" office:value-type="string">
            <text:p text:style-name="TableHeaderPara">Current Status</text:p>
          </table:table-cell>
        </table:table-row>
        <table:table-row>
          <table:table-cell table:style-name="TableCell" office:value-type="string">
            <text:p text:style-name="TablePara">Wrong lib_ids on custom power symbols</text:p>
            <text:p text:style-name="TablePara">(−3.5V_RX_OPAMPS shorts to +5V/+6V global net)</text:p>
          </table:table-cell>
          <table:table-cell table:style-name="TableCell" office:value-type="string">
            <text:p text:style-name="TablePara">rx_mixer</text:p>
            <text:p text:style-name="TablePara">rx_driver_amp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RETRACTED — false positive. kicad-cli</text:p>
            <text:p text:style-name="TablePara">netlist export confirms each custom</text:p>
            <text:p text:style-name="TablePara">Value (−3.5V_RX_OPAMPS, +6.5V_RX_OPAMPS,</text:p>
            <text:p text:style-name="TablePara">+3.3V_DSP_UC, etc.) creates its own</text:p>
            <text:p text:style-name="TablePara">isolated net. KiCad uses a power symbol's</text:p>
            <text:p text:style-name="TablePara">Value text — not its lib_id — as the net</text:p>
            <text:p text:style-name="TablePara">name. Rails are correctly isolated</text:p>
          </table:table-cell>
        </table:table-row>
        <table:table-row>
          <table:table-cell table:style-name="TableCell" office:value-type="string">
            <text:p text:style-name="TablePara">R903/907/908/909 missing 'k' suffix</text:p>
            <text:p text:style-name="TablePara">(49.9 Ω not 49.9 kΩ)</text:p>
          </table:table-cell>
          <table:table-cell table:style-name="TableCell" office:value-type="string">
            <text:p text:style-name="TablePara">power_ldo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PARTIALLY FIXED — three other SET</text:p>
            <text:p text:style-name="TablePara">resistors corrected; four listed</text:p>
            <text:p text:style-name="TablePara">instances still at bare '49.9'</text:p>
          </table:table-cell>
        </table:table-row>
        <table:table-row>
          <table:table-cell table:style-name="TableCell" office:value-type="string">
            <text:p text:style-name="TablePara">LT8330 R1101/R1102 wrong feedback</text:p>
            <text:p text:style-name="TablePara">(produces −1.79V not −5V)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R1101=1M, R1102=806k</text:p>
            <text:p text:style-name="TablePara">confirmed in schematic. Need</text:p>
            <text:p text:style-name="TablePara">R1101 = 4.22 MΩ for −5V</text:p>
          </table:table-cell>
        </table:table-row>
        <table:table-row>
          <table:table-cell table:style-name="TableCell" office:value-type="string">
            <text:p text:style-name="TablePara">ADP2303 R1103/R1104 wrong values</text:p>
            <text:p text:style-name="TablePara">(1.6V not target)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both still 100kΩ → 1.6V.</text:p>
            <text:p text:style-name="TablePara">R1110/R1111, R1112/R1113 now</text:p>
            <text:p text:style-name="TablePara">populated correctly (6V, 8V rails)</text:p>
          </table:table-cell>
        </table:table-row>
        <table:table-row>
          <table:table-cell table:style-name="TableCell" office:value-type="string">
            <text:p text:style-name="TablePara">R701 = 1kΩ on OSC_CTRL below 20kΩ min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R701 still reads '1k'</text:p>
            <text:p text:style-name="TablePara">in schematic</text:p>
          </table:table-cell>
        </table:table-row>
        <table:table-row>
          <table:table-cell table:style-name="TableCell" office:value-type="string">
            <text:p text:style-name="TablePara">U706 SN74CBT3253/SN74CBTLV3253</text:p>
            <text:p text:style-name="TablePara">part-value mismatch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symbol=SN74CBT3253,</text:p>
            <text:p text:style-name="TablePara">value=SN74CBTLV3253 mismatch</text:p>
            <text:p text:style-name="TablePara">still present</text:p>
          </table:table-cell>
        </table:table-row>
        <table:table-row>
          <table:table-cell table:style-name="TableCell" office:value-type="string">
            <text:p text:style-name="TablePara">ADAU1962A AVDD 2.5V label</text:p>
            <text:p text:style-name="TablePara">(min 3.0V)</text:p>
          </table:table-cell>
          <table:table-cell table:style-name="TableCell" office:value-type="string">
            <text:p text:style-name="TablePara">dac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four '2.5V' labels in DAC</text:p>
            <text:p text:style-name="TablePara">sheet; Q601 emitter follower</text:p>
            <text:p text:style-name="TablePara">produces ~2.7V (below 3.0V min)</text:p>
          </table:table-cell>
        </table:table-row>
        <table:table-row>
          <table:table-cell table:style-name="TableCell" office:value-type="string">
            <text:p text:style-name="TablePara">#PWR0406 power:+3.3V for</text:p>
            <text:p text:style-name="TablePara">+3.3V_CONVERTER rail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RETRACTED — false positive. lib_id</text:p>
            <text:p text:style-name="TablePara">'power:+3.3V' (matching voltage) with</text:p>
            <text:p text:style-name="TablePara">Value overridden to '+3.3V_CONVERTERS'</text:p>
            <text:p text:style-name="TablePara">is the correct, standard way to create</text:p>
            <text:p text:style-name="TablePara">an isolated rail in KiCad. Netlist</text:p>
            <text:p text:style-name="TablePara">confirms a separate '+3.3V_CONVERTERS'</text:p>
            <text:p text:style-name="TablePara">net — no merge with digital +3.3V</text:p>
          </table:table-cell>
        </table:table-row>
        <table:table-row>
          <table:table-cell table:style-name="TableCell" office:value-type="string">
            <text:p text:style-name="TablePara">'DVDOUT' label should be 'DVDDOUT'</text:p>
            <text:p text:style-name="TablePara">(ADAU1361 LDO decoupling disconnected)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'DVDOUT' still present at</text:p>
            <text:p text:style-name="TablePara">two locations in schematic</text:p>
          </table:table-cell>
        </table:table-row>
        <table:table-row>
          <table:table-cell table:style-name="TableCell" office:value-type="string">
            <text:p text:style-name="TablePara">LT3045/LT3094 output caps 4.7µF</text:p>
            <text:p text:style-name="TablePara">(minimum 10µF for stability)</text:p>
          </table:table-cell>
          <table:table-cell table:style-name="TableCell" office:value-type="string">
            <text:p text:style-name="TablePara">power_ldo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all LT3045 outputs still</text:p>
            <text:p text:style-name="TablePara">at 4.7µF; multiple confirmed instances.</text:p>
            <text:p text:style-name="TablePara">LDOs will oscillate</text:p>
          </table:table-cell>
        </table:table-row>
        <table:table-row>
          <table:table-cell table:style-name="TableCell" office:value-type="string">
            <text:p text:style-name="TablePara">TX reconstruction filter absent</text:p>
            <text:p text:style-name="TablePara">despite sheet title promising it</text:p>
          </table:table-cell>
          <table:table-cell table:style-name="TableCell" office:value-type="string">
            <text:p text:style-name="TablePara">tx_mixer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no filter components</text:p>
            <text:p text:style-name="TablePara">present on tx_mixer sheet</text:p>
          </table:table-cell>
        </table:table-row>
        <table:table-row>
          <table:table-cell table:style-name="TableCell" office:value-type="string">
            <text:p text:style-name="TablePara">ADA4945-1 feedback caps all DNP</text:p>
            <text:p text:style-name="TablePara">(oscillation risk at 9.53kΩ Rf)</text:p>
          </table:table-cell>
          <table:table-cell table:style-name="TableCell" office:value-type="string">
            <text:p text:style-name="TablePara">rx_driver_amps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DOWNGRADED — re-checked against</text:p>
            <text:p text:style-name="TablePara">ADA4945-1 datasheet (in repo). Standard</text:p>
            <text:p text:style-name="TablePara">feedback topology is purely resistive</text:p>
            <text:p text:style-name="TablePara">(4-resistor RF/RG network); datasheet's own</text:p>
            <text:p text:style-name="TablePara">ADC-driving example uses G=1 with no Cf</text:p>
            <text:p text:style-name="TablePara">and never mentions oscillation risk. These</text:p>
            <text:p text:style-name="TablePara">180pF parts are optional output-filter</text:p>
            <text:p text:style-name="TablePara">provisions (designer-confirmed), correctly</text:p>
            <text:p text:style-name="TablePara">DNP unless added filtering is desired</text:p>
          </table:table-cell>
        </table:table-row>
        <table:table-row>
          <table:table-cell table:style-name="TableCell" office:value-type="string">
            <text:p text:style-name="TablePara">R910 = 16.5kΩ produces 1.65V</text:p>
            <text:p text:style-name="TablePara">not 1.8V on clocktree rail</text:p>
          </table:table-cell>
          <table:table-cell table:style-name="TableCell" office:value-type="string">
            <text:p text:style-name="TablePara">power_ldos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R910 still at 16.5kΩ;</text:p>
            <text:p text:style-name="TablePara">need 18.0kΩ for 1.8V</text:p>
          </table:table-cell>
        </table:table-row>
        <table:table-row>
          <table:table-cell table:style-name="TableCell" office:value-type="string">
            <text:p text:style-name="TablePara">ADA4807-1 DISABLE pin unconfirmed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pin 5 has no connection</text:p>
          </table:table-cell>
        </table:table-row>
        <table:table-row>
          <table:table-cell table:style-name="TableCell" office:value-type="string">
            <text:p text:style-name="TablePara">No differential shunt caps on</text:p>
            <text:p text:style-name="TablePara">AIN+/AIN− pairs</text:p>
          </table:table-cell>
          <table:table-cell table:style-name="TableCell" office:value-type="string">
            <text:p text:style-name="TablePara">adcs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C405 (390pF) and C406</text:p>
            <text:p text:style-name="TablePara">(5600pF) both DNP; no populated</text:p>
            <text:p text:style-name="TablePara">anti-aliasing cap on any AIN pair</text:p>
          </table:table-cell>
        </table:table-row>
        <table:table-row>
          <table:table-cell table:style-name="TableCell" office:value-type="string">
            <text:p text:style-name="TablePara">PLL1 LF1_EXT_CAP not confirmed</text:p>
            <text:p text:style-name="TablePara">present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no cap confirmed on</text:p>
            <text:p text:style-name="TablePara">AD9523-1 pin 7 net</text:p>
          </table:table-cell>
        </table:table-row>
        <table:table-row>
          <table:table-cell table:style-name="TableCell" office:value-type="string">
            <text:p text:style-name="TablePara">CTS 535 EOH and Vc not confirmed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EOH pin disposition</text:p>
            <text:p text:style-name="TablePara">unconfirmed; VCXO vs TCXO</text:p>
            <text:p text:style-name="TablePara">conflict newly identified</text:p>
          </table:table-cell>
        </table:table-row>
        <table:table-row>
          <table:table-cell table:style-name="TableCell" office:value-type="string">
            <text:p text:style-name="TablePara">AD9523-1 ZD_IN/ZD_IN_b not</text:p>
            <text:p text:style-name="TablePara">terminated</text:p>
          </table:table-cell>
          <table:table-cell table:style-name="TableCell" office:value-type="string">
            <text:p text:style-name="TablePara">clock_tree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pins 70/71 disposition</text:p>
            <text:p text:style-name="TablePara">not confirmed</text:p>
          </table:table-cell>
        </table:table-row>
        <table:table-row>
          <table:table-cell table:style-name="TableCell" office:value-type="string">
            <text:p text:style-name="TablePara">I2S/TDM pull-up resistors not</text:p>
            <text:p text:style-name="TablePara">confirmed for ADAU1361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no pull-ups found</text:p>
            <text:p text:style-name="TablePara">in audio_subsystem sheet</text:p>
          </table:table-cell>
        </table:table-row>
        <table:table-row>
          <table:table-cell table:style-name="TableCell" office:value-type="string">
            <text:p text:style-name="TablePara">SSM2211S bulk bypass cap missing</text:p>
          </table:table-cell>
          <table:table-cell table:style-name="TableCell" office:value-type="string">
            <text:p text:style-name="TablePara">audio_subsystem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only 100nF C1214 on</text:p>
            <text:p text:style-name="TablePara">5V supply; need 10–47µF bulk</text:p>
          </table:table-cell>
        </table:table-row>
        <table:table-row>
          <table:table-cell table:style-name="TableCell" office:value-type="string">
            <text:p text:style-name="TablePara">C623/C624/C628 value '0.iu' typo</text:p>
            <text:p text:style-name="TablePara">(unparseable by BOM tools)</text:p>
          </table:table-cell>
          <table:table-cell table:style-name="TableCell" office:value-type="string">
            <text:p text:style-name="TablePara">dacs</text:p>
          </table:table-cell>
          <table:table-cell table:style-name="TableCell" office:value-type="string">
            <text:p text:style-name="TablePara">CRITICAL</text:p>
          </table:table-cell>
          <table:table-cell table:style-name="TableCell" office:value-type="string">
            <text:p text:style-name="TablePara">OPEN — confirmed still '0.iu'</text:p>
            <text:p text:style-name="TablePara">at three locations</text:p>
          </table:table-cell>
        </table:table-row>
        <table:table-row>
          <table:table-cell table:style-name="TableCell" office:value-type="string">
            <text:p text:style-name="TablePara">ADP2303 PGOOD pins: no pull-ups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no pull-up resistors;</text:p>
            <text:p text:style-name="TablePara">no sequencing defined</text:p>
          </table:table-cell>
        </table:table-row>
        <table:table-row>
          <table:table-cell table:style-name="TableCell" office:value-type="string">
            <text:p text:style-name="TablePara">ADP2303 inductors 3.3µH</text:p>
            <text:p text:style-name="TablePara">(datasheet recommends 4.7µH)</text:p>
          </table:table-cell>
          <table:table-cell table:style-name="TableCell" office:value-type="string">
            <text:p text:style-name="TablePara">power_switching_reg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OPEN — three instances still</text:p>
            <text:p text:style-name="TablePara">at '3.3u 3A'</text:p>
          </table:table-cell>
        </table:table-row>
        <table:table-row>
          <table:table-cell table:style-name="TableCell" office:value-type="string">
            <text:p text:style-name="TablePara">Footprints missing on majority</text:p>
            <text:p text:style-name="TablePara">of passive components</text:p>
          </table:table-cell>
          <table:table-cell table:style-name="TableCell" office:value-type="string">
            <text:p text:style-name="TablePara">all sheets</text:p>
          </table:table-cell>
          <table:table-cell table:style-name="TableCell" office:value-type="string">
            <text:p text:style-name="TablePara">HIGH</text:p>
          </table:table-cell>
          <table:table-cell table:style-name="TableCell" office:value-type="string">
            <text:p text:style-name="TablePara">PARTIALLY ADDRESSED — some</text:p>
            <text:p text:style-name="TablePara">footprints assigned; many still</text:p>
            <text:p text:style-name="TablePara">missing across all sheets</text:p>
          </table:table-cell>
        </table:table-row>
      </table:table>
      <text:p text:style-name="Body Text"/>
      <text:h text:outline-level="1" text:style-name="Heading 1">5. Per-Sheet Findings Summary</text:h>
      <text:h text:outline-level="2" text:style-name="Heading 2">5.1 rx_mixer.kicad_sch — 8-Phase Receive Mixer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Hold cap bandwidth: 100 nF with N=8 phases gives BW ≈ 4 kHz, not 96 kHz as annotated (annotation uses N=1). Recalculate for N=8: C_hold ≈ 2 nF for ±200 kHz target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ADA4625-2 exposed pad (EP, pin 9) not confirmed connected to V−. Required by datasheet; floating EP degrades thermal performance and substrate coupling between phase channels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10µF caps on +6.5V rail in 0603 package: 0603 ceramics typically rated ≤6.3V. Replace with 16V-rated 0805 parts.</text:p>
          </table:table-cell>
        </table:table-row>
      </table:table>
      <text:p text:style-name="Body Text"/>
      <text:h text:outline-level="2" text:style-name="Heading 2">5.2 rx_driver_amps.kicad_sch — Differential Driver Amplifiers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" office:value-type="string">
            <text:p text:style-name="TablePara">LOW (REVISED)</text:p>
          </table:table-cell>
          <table:table-cell table:style-name="TableCell" office:value-type="string">
            <text:p text:style-name="TablePara">ADA4945-1 feedback caps C343/C322/C319/C320/C340/C341/C344 (180pF) marked DNP. Re-checked against datasheet: standard feedback topology is purely resistive (RF/RG), the datasheet's own G=1 ADC-driving example uses no Cf, and oscillation is not mentioned anywhere in the part's documentation. These are optional output-filter provisions — correctly DNP as designed; populate only if additional anti-aliasing filtering ahead of the ADC is wanted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Rf = 9.53kΩ contributes 12.6 nV/√Hz thermal noise at virtual ground node, dominating ADA4945-1's own 1.7 nV/√Hz. Consider reducing to 2–4kΩ range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ADA4945-1 VOCM pin not explicitly driven. Default VOCM = +1.5V (supply midpoint). ADAU1979 requires VOCM = AVDD/2 = 1.65V. Marginal match, supply-voltage dependent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BB_0/BB_180 to P0_IN+/P0_IN− pairing not confirmed at top level. Incorrect I/Q phase assignment destroys image rejection.</text:p>
          </table:table-cell>
        </table:table-row>
      </table:table>
      <text:p text:style-name="Body Text"/>
      <text:h text:outline-level="2" text:style-name="Heading 2">5.3 clock_tree.kicad_sch — Phase Clock Generation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 (REVISED)</text:p>
          </table:table-cell>
          <table:table-cell table:style-name="TableCell" office:value-type="string">
            <text:p text:style-name="TablePara">R701 = 1kΩ wired in series between AD9523-1 pin 8 (OSC_CTRL, confirmed via netlist) and U7/ABLNO-VCXO pin 1 (Vc). ABLNO datasheet specifies 'Control Voltage Port Impedance' = 10kΩ at that pin (the source of the '10kΩ' figure — not an AD9523-1 internal resistance as originally stated; no such figure exists in that datasheet). Total series load = 1kΩ + 10kΩ = 11kΩ, below the AD9523-1's documented 'RLOAD &gt; 20kΩ' condition (Table 5) for guaranteed OSC_CTRL output-low levels. Likely consequence: restricted VCXO tuning range / marginal PLL1 lock acquisition, not an absolute 'will not lock.' Designer-proposed fix (R701 → 20kΩ, giving 30kΩ total with ~50% margin) is correct and adopted — see T1-4.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U706: symbol=SN74CBT3253 (5V), value=SN74CBTLV3253 (3.6V max). Wrong device assembled; 3.6V-max part destroyed at 5V supply, or 5V part produces wrong specifications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VCXO vs. TCXO conflict: CLAUDE.md says CTS_535_TCXO; schematic instantiates ABLNO-V-VCXO. Commit to ABLNO-VCXO (correct for AD9523-1 PLL1); update documentation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PLL1 external loop filter cap (AD9523-1 pin 7, LF1_EXT_CAP) not confirmed present. PLL1 cannot lock without it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CTS 535 (or ABLNO-VCXO) EOH enable pin and Vc control not confirmed connected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AD9523-1 ZD_IN/ZD_IN_b (pins 70/71) not driven or terminated for zero-delay-bypass mode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Frequency plan annotation absent from schematic. No divider settings, VCO frequencies, or output frequencies documented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OSC_IN_b (AD9523-1 pin 10) AC-ground capacitor (100nF to GND) not confirmed for single-ended input mode.</text:p>
          </table:table-cell>
        </table:table-row>
      </table:table>
      <text:p text:style-name="Body Text"/>
      <text:h text:outline-level="2" text:style-name="Heading 2">5.4 adcs.kicad_sch — ADAU1979 ADC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 (NEW)</text:p>
          </table:table-cell>
          <table:table-cell table:style-name="TableCell" office:value-type="string">
            <text:p text:style-name="TablePara">C406 (5600pF, PLL_FILT) marked DNP. ADAU1979 internal PLL cannot lock without this external capacitor. ADC is completely non-functional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R410 (3kΩ) loads ADAU1979 VREF pin (unbuffered bandgap output) with 0.83 mA before ADA4807-1 buffer. Correct topology: buffer first, then divide. VREF voltage may be pulled low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No differential shunt capacitors (100–470pF C0G) across any AIN+/AIN− pair. 10Ω series resistors alone provide no anti-aliasing or RF rejection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ADA4807-1 DISABLE (pin 5) has no connection. Active-low; floating may disable the amplifier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10µF AVDD caps C401/C403 assigned to 0402 footprint. DC bias derating reduces effective C to 3–5µF at 3.3V — marginal for ADAU1979. Use 0805 instead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SA_MODE, ADDR0, ADDR1 pin levels not annotated. I2C address and serial interface mode undefined.</text:p>
          </table:table-cell>
        </table:table-row>
      </table:table>
      <text:p text:style-name="Body Text"/>
      <text:h text:outline-level="2" text:style-name="Heading 2">5.5 dacs.kicad_sch — ADAU1962A DAC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ADAU1962A AVDD below 3.0V minimum. Q601 (FZT951TA) emitter follower produces ~3.3V − 0.6V = 2.7V at room temp; falls further with temperature. DAC out of spec.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C623/C624/C628 have value '0.iu' — BOM tools cannot parse; capacitors will be omitted from build. Intended value: 100nF.</text:p>
          </table:table-cell>
        </table:table-row>
        <table:table-row>
          <table:table-cell table:style-name="TableCellCritical" office:value-type="string">
            <text:p text:style-name="TablePara">CRITICAL (NEW)</text:p>
          </table:table-cell>
          <table:table-cell table:style-name="TableCell" office:value-type="string">
            <text:p text:style-name="TablePara">Net '2.5' (no V suffix) at line 6617 creates isolated net separate from '2.5V' nets. Floating node risk at DAC reference circuitry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Q601 emitter-follower AVDD has no feedback regulation. Supply rejection is poor; DAC THD+N will be degraded from datasheet specification. Replace with LT3045 for correct AVDD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R614 (IBIAS, 3.32kΩ) has no tolerance annotation. Must be 1% tolerance per datasheet. 5% substitution shifts DAC full-scale by ±5%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MCLK frequency not annotated. ADAU1962A requires MCLK ratio annotation (256× at 48kHz or 128× at 192kHz) to verify SigmaStudio configuration.</text:p>
          </table:table-cell>
        </table:table-row>
      </table:table>
      <text:p text:style-name="Body Text"/>
      <text:h text:outline-level="2" text:style-name="Heading 2">5.6 dsp.kicad_sch — ADAU1467 SigmaDSP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SELFBOOT pin state not documented. 25AA1024 SPI EEPROM (U502) has empty footprint field — absent from layout. Self-boot path non-functional without EEPROM on PCB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Label 'MiSO_M' (mixed case) creates separate net from 'MISO_M'. KiCad net names are case-sensitive. SPI EEPROM read path broken at this label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17 ADAU1467 power pins across 4 supply domains require individual 100nF decoupling caps. Shared decoupling inadequate at 294 MHz core clock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ADAU1467 I2C address configuration not documented. SELFBOOT/ADDR pin states must be annotated; address collisions with ADAU1979, ADAU1962A, ADAU1361 must be ruled out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SigmaStudio project file not referenced from schematic. TDM slot assignments, MCLK ratio, NCO configuration cannot be verified by inspection.</text:p>
          </table:table-cell>
        </table:table-row>
        <table:table-row>
          <table:table-cell table:style-name="TableCell" office:value-type="string">
            <text:p text:style-name="TablePara">MINOR</text:p>
          </table:table-cell>
          <table:table-cell table:style-name="TableCell" office:value-type="string">
            <text:p text:style-name="TablePara">DSP_CLK (MCLK) frequency not annotated on schematic. Critical for SigmaStudio PLL configuration.</text:p>
          </table:table-cell>
        </table:table-row>
      </table:table>
      <text:p text:style-name="Body Text"/>
      <text:h text:outline-level="2" text:style-name="Heading 2">5.7 power_ldos.kicad_sch — LT3045/LT3094 LDOs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R903/R907/R908/R909: value '49.9' without 'k' suffix = 49.9Ω → V_OUT ≈ 5mV on four LDO rails. Three other instances correctly read '49.9k'. Fix: add 'k' suffix to all four.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All LT3045 output caps at 4.7µF (confirmed multiple instances). LT3045 datasheet requires minimum 10µF ceramic for stability. All LDOs will oscillate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R910 = 16.5kΩ → +1.8V_CLOCKTREE = 1.65V. Need 18.0kΩ for 1.8V output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LT3094 output cap C931 = 4.7µF (minimum 10µF required for stability)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'04.7u' notation on two SET bypass caps is ambiguous. Correct to '470n' (intended value for LT3045 SET pin bypass per datasheet)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No ferrite bead between ADP2303 8V output and LT3045 input pins. 700kHz switcher ripple degrades LDO PSRR advantage.</text:p>
          </table:table-cell>
        </table:table-row>
      </table:table>
      <text:p text:style-name="Body Text"/>
      <text:h text:outline-level="2" text:style-name="Heading 2">5.8 power_switching_reg.kicad_sch — Switching Regulators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LT8330 R1101 = 1MΩ produces −1.79V not −5V. Required: R1101 = 4.22MΩ (E96). Formula: R1 = R2 × (|Vout|/0.80V − 1) = 806k × 5.25 = 4.23MΩ.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ADP2303 R1103/R1104 = 100k/100k produces 1.6V. Formula: Vout = 0.800 × (1 + RTOP/RBOT). For 4V: RTOP = 4 × RBOT = 400kΩ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ADP2303 output bulk caps '47u 6.3V' — if on 8V output rail (R1112/R1113 instance), 6.3V rating is violated. Replace with 47µF 16V-rated on 8V rail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PGOOD pins on U1102/U1103/U1104 (ADP2303): no pull-up resistors and no no-connect markers. Power sequencing undefined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ADP2303 inductors: 3.3µH fitted vs. 4.7µH datasheet recommendation. Higher ripple current, saturation risk at full load.</text:p>
          </table:table-cell>
        </table:table-row>
      </table:table>
      <text:p text:style-name="Body Text"/>
      <text:h text:outline-level="2" text:style-name="Heading 2">5.9 audio_subsystem.kicad_sch — ADAU1361 Codec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Critical" office:value-type="string">
            <text:p text:style-name="TablePara">CRITICAL</text:p>
          </table:table-cell>
          <table:table-cell table:style-name="TableCell" office:value-type="string">
            <text:p text:style-name="TablePara">Net label 'DVDOUT' should be 'DVDDOUT'. ADAU1361 DVDDOUT (pin 24, internal 1.8V LDO output) drives the 'DVDDOUT' net; the 10µF decoupling caps are stranded on floating 'DVDOUT' net. Codec non-functional.</text:p>
          </table:table-cell>
        </table:table-row>
        <table:table-row>
          <table:table-cell table:style-name="TableCellCritical" office:value-type="string">
            <text:p text:style-name="TablePara">CRITICAL (NEW)</text:p>
          </table:table-cell>
          <table:table-cell table:style-name="TableCell" office:value-type="string">
            <text:p text:style-name="TablePara">C1215/C1216 (220µF polarized) assigned to 0402 footprint. No 220µF ceramic in 0402 exists. Assembly will fail. Change to appropriate electrolytic/tantalum footprint.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SSM2211S (U1202): only 100nF C1214 on V+ supply. Peak current ≈400mA requires 10–47µF bulk bypass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RINP/RINN/RAUX (ADAU1361 pins 12/13/14) marked no_connect. Datasheet requires connection to CM. Floating analog inputs introduce noise into sigma-delta modulator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JACKDET/MICIN (pin 4) marked no_connect. Floating digital input — add pull to defined level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No RF EMI filter caps on any audio input. In RF radio environment, audio traces act as antennas. Add 100pF C0G to GND on each input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AMP_SHUTDOWN default pull-down not confirmed at signal source. SSM2211S should default to shutdown (safe) at power-up.</text:p>
          </table:table-cell>
        </table:table-row>
      </table:table>
      <text:p text:style-name="Body Text"/>
      <text:h text:outline-level="2" text:style-name="Heading 2">5.10 tx_mixer.kicad_sch — Transmit Mixer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High" office:value-type="string">
            <text:p text:style-name="TablePara">HIGH</text:p>
          </table:table-cell>
          <table:table-cell table:style-name="TableCell" office:value-type="string">
            <text:p text:style-name="TablePara">No reconstruction filter present despite sheet title 'Reconstruction Filter'. DAC images at LO ± 192kHz feed PA interface directly. Part 97 compliance cannot be claimed.</text:p>
          </table:table-cell>
        </table:table-row>
        <table:table-row>
          <table:table-cell table:style-name="TableCellHigh" office:value-type="string">
            <text:p text:style-name="TablePara">HIGH (NEW)</text:p>
          </table:table-cell>
          <table:table-cell table:style-name="TableCell" office:value-type="string">
            <text:p text:style-name="TablePara">DAC_N+/DAC_N− differential polarity per switch arm not verified. Polarity reversal injects image instead of desired signal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SN74CBT3125CPW symbol with Value 'SN74CBTLV3125' — BOM will pull wrong device (wrong voltage rating)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Duplicate hierarchical labels for all 8 CLK phases — benign if at different coordinates but creates ERC ambiguity; run ERC to confirm clean.</text:p>
          </table:table-cell>
        </table:table-row>
        <table:table-row>
          <table:table-cell table:style-name="TableCellNew" office:value-type="string">
            <text:p text:style-name="TablePara">MODERATE (NEW)</text:p>
          </table:table-cell>
          <table:table-cell table:style-name="TableCell" office:value-type="string">
            <text:p text:style-name="TablePara">Clock signal naming 'CLK_N' inconsistent with 'tx_phase_N' from clock_tree and 'phase_N' from rx_mixer. Verify all hierarchical connections are intact.</text:p>
          </table:table-cell>
        </table:table-row>
      </table:table>
      <text:p text:style-name="Body Text"/>
      <text:h text:outline-level="2" text:style-name="Heading 2">5.11 microcontroller.kicad_sch — Raspberry Pi Pico</text:h>
      <table:table table:style-name="TableGrid">
        <table:table-column table:style-name="Col3.0cm"/>
        <table:table-column table:style-name="Col14.0cm"/>
        <table:table-row>
          <table:table-cell table:style-name="TableCellHeader" office:value-type="string">
            <text:p text:style-name="TableHeaderPara">Priority</text:p>
          </table:table-cell>
          <table:table-cell table:style-name="TableCellHeader" office:value-type="string">
            <text:p text:style-name="TableHeaderPara">Finding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Q501 USB_RESET circuit incomplete (acknowledged in schematic note). Complete or document replacement approach before fabrication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SWIO_0–3 hierarchical labels have no defined destination or purpose annotation. Add hierarchical labels and document SWIO_VLOGIC source voltage.</text:p>
          </table:table-cell>
        </table:table-row>
        <table:table-row>
          <table:table-cell table:style-name="TableCell" office:value-type="string">
            <text:p text:style-name="TablePara">MODERATE</text:p>
          </table:table-cell>
          <table:table-cell table:style-name="TableCell" office:value-type="string">
            <text:p text:style-name="TablePara">MCP23017 GPA7/GPB7 must be outputs only (silicon errata). Confirm schematic and planned firmware enforce this.</text:p>
          </table:table-cell>
        </table:table-row>
        <table:table-row>
          <table:table-cell table:style-name="TableCell" office:value-type="string">
            <text:p text:style-name="TablePara">MINOR</text:p>
          </table:table-cell>
          <table:table-cell table:style-name="TableCell" office:value-type="string">
            <text:p text:style-name="TablePara">ADAU1467 I2C/SPI address configuration not cross-referenced from this sheet. Verify address conflicts with other I2C devices are ruled out.</text:p>
          </table:table-cell>
        </table:table-row>
      </table:table>
      <text:p text:style-name="Body Text"/>
      <text:h text:outline-level="1" text:style-name="Heading 1">6. Prioritized Action Plan</text:h>
      <text:h text:outline-level="2" text:style-name="Heading 2">6.1 Tier 1 — Block Layout: Must Fix First</text:h>
      <text:p text:style-name="Body Text">All Tier 1 actions must be completed and verified before committing to PCB stackup.</text:p>
      <table:table table:style-name="TableGrid">
        <table:table-column table:style-name="Col1.2cm"/>
        <table:table-column table:style-name="Col9.0cm"/>
        <table:table-column table:style-name="Col1.8cm"/>
        <table:table-column table:style-name="Col3.0cm"/>
        <table:table-row>
          <table:table-cell table:style-name="TableCellHeader" office:value-type="string">
            <text:p text:style-name="TableHeaderPara">#</text:p>
          </table:table-cell>
          <table:table-cell table:style-name="TableCellHeader" office:value-type="string">
            <text:p text:style-name="TableHeaderPara">Action</text:p>
          </table:table-cell>
          <table:table-cell table:style-name="TableCellHeader" office:value-type="string">
            <text:p text:style-name="TableHeaderPara">Owner</text:p>
          </table:table-cell>
          <table:table-cell table:style-name="TableCellHeader" office:value-type="string">
            <text:p text:style-name="TableHeaderPara">Sheets</text:p>
          </table:table-cell>
        </table:table-row>
        <table:table-row>
          <table:table-cell table:style-name="TableCell" office:value-type="string">
            <text:p text:style-name="TablePara">T1-1</text:p>
          </table:table-cell>
          <table:table-cell table:style-name="TableCell" office:value-type="string">
            <text:p text:style-name="TablePara">Correct all LT3045/LT3094 SET resistors: add 'k' suffix to R903, R907, R908, R909 (49.9Ω → 49.9kΩ). Verify each LT3045 output voltage against target. Fix R910 to 18.0kΩ for +1.8V_CLOCKTREE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ldos</text:p>
          </table:table-cell>
        </table:table-row>
        <table:table-row>
          <table:table-cell table:style-name="TableCell" office:value-type="string">
            <text:p text:style-name="TablePara">T1-2</text:p>
          </table:table-cell>
          <table:table-cell table:style-name="TableCell" office:value-type="string">
            <text:p text:style-name="TablePara">Replace all LT3045/LT3094 output capacitors from 4.7µF to ≥10µF ceramic (X5R/X7R, 0805, adequate voltage derating). Verify C931 (LT3094 output) also replaced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ldos</text:p>
          </table:table-cell>
        </table:table-row>
        <table:table-row>
          <table:table-cell table:style-name="TableCell" office:value-type="string">
            <text:p text:style-name="TablePara">T1-3</text:p>
          </table:table-cell>
          <table:table-cell table:style-name="TableCell" office:value-type="string">
            <text:p text:style-name="TablePara">Recalculate switching regulator feedback resistors: R1101 → 4.22MΩ (LT8330 for −5V); R1103 → 402kΩ (ADP2303 for target voltage). Verify all six populated resistors (R1108–R1113) produce correct output voltages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switching_reg</text:p>
          </table:table-cell>
        </table:table-row>
        <table:table-row>
          <table:table-cell table:style-name="TableCell" office:value-type="string">
            <text:p text:style-name="TablePara">T1-4</text:p>
          </table:table-cell>
          <table:table-cell table:style-name="TableCell" office:value-type="string">
            <text:p text:style-name="TablePara">Change R701 (series resistor between AD9523-1 OSC_CTRL and the ABLNO-VCXO's Vc input, ~10kΩ port impedance) from 1kΩ to 20kΩ, as the designer proposed. This brings the total OSC_CTRL load to ~30kΩ, clearing the AD9523-1's 'RLOAD &gt; 20kΩ' condition (Table 5) with ~50% margin — better than simply hitting the 20kΩ floor (10kΩ would land exactly on the boundary of a strict '&gt;' spec). Document the series-load calculation (R701 + VCXO Vc port impedance) on the schematic.</text:p>
          </table:table-cell>
          <table:table-cell table:style-name="TableCell" office:value-type="string">
            <text:p text:style-name="TablePara">Clock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1-5</text:p>
          </table:table-cell>
          <table:table-cell table:style-name="TableCell" office:value-type="string">
            <text:p text:style-name="TablePara">Resolve U706 part/value conflict. Commit to SN74CBT3253 (5V) for Tx mux; update symbol lib_id, value, footprint, and BOM entry consistently. Also resolve VCXO vs. TCXO conflict: commit to ABLNO-VCXO; update CLAUDE.md.</text:p>
          </table:table-cell>
          <table:table-cell table:style-name="TableCell" office:value-type="string">
            <text:p text:style-name="TablePara">Clock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1-6</text:p>
          </table:table-cell>
          <table:table-cell table:style-name="TableCell" office:value-type="string">
            <text:p text:style-name="TablePara">Fix ADAU1962A AVDD supply: replace Q601 (FZT951TA emitter follower producing ~2.7V) with LT3045 LDO set to 3.3V. Fix '0.iu' typo on C623/C624/C628 → '100n'. Rename '2.5' net label → '2.5V'.</text:p>
          </table:table-cell>
          <table:table-cell table:style-name="TableCell" office:value-type="string">
            <text:p text:style-name="TablePara">Precision</text:p>
          </table:table-cell>
          <table:table-cell table:style-name="TableCell" office:value-type="string">
            <text:p text:style-name="TablePara">dacs</text:p>
          </table:table-cell>
        </table:table-row>
        <table:table-row>
          <table:table-cell table:style-name="TableCell" office:value-type="string">
            <text:p text:style-name="TablePara">T1-7</text:p>
          </table:table-cell>
          <table:table-cell table:style-name="TableCell" office:value-type="string">
            <text:p text:style-name="TablePara">Rename 'DVDOUT' → 'DVDDOUT' in audio_subsystem.kicad_sch (two instances). Run ERC to confirm CM and DVDDOUT nets are distinct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</table:table-cell>
        </table:table-row>
        <table:table-row>
          <table:table-cell table:style-name="TableCell" office:value-type="string">
            <text:p text:style-name="TablePara">T1-8</text:p>
          </table:table-cell>
          <table:table-cell table:style-name="TableCell" office:value-type="string">
            <text:p text:style-name="TablePara">Populate C406 (5600pF, ADAU1979 PLL_FILT): remove DNP marker. ADC is non-functional with this cap absent.</text:p>
          </table:table-cell>
          <table:table-cell table:style-name="TableCell" office:value-type="string">
            <text:p text:style-name="TablePara">Precision</text:p>
          </table:table-cell>
          <table:table-cell table:style-name="TableCell" office:value-type="string">
            <text:p text:style-name="TablePara">adcs</text:p>
          </table:table-cell>
        </table:table-row>
        <table:table-row>
          <table:table-cell table:style-name="TableCell" office:value-type="string">
            <text:p text:style-name="TablePara">T1-9</text:p>
          </table:table-cell>
          <table:table-cell table:style-name="TableCell" office:value-type="string">
            <text:p text:style-name="TablePara">Correct hold cap values: recalculate for N=8 phases. For ±200kHz BW: C_hold ≈ 2nF. Update all HC_201–HC_208 values and correct N annotation from N=1 to N=8 in the design note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rx_mixer</text:p>
          </table:table-cell>
        </table:table-row>
      </table:table>
      <text:p text:style-name="Body Text"/>
      <text:h text:outline-level="2" text:style-name="Heading 2">6.2 Tier 2 — Fix Before PCB Stackup Decisions</text:h>
      <table:table table:style-name="TableGrid">
        <table:table-column table:style-name="Col1.2cm"/>
        <table:table-column table:style-name="Col9.0cm"/>
        <table:table-column table:style-name="Col1.8cm"/>
        <table:table-column table:style-name="Col3.0cm"/>
        <table:table-row>
          <table:table-cell table:style-name="TableCellHeader" office:value-type="string">
            <text:p text:style-name="TableHeaderPara">#</text:p>
          </table:table-cell>
          <table:table-cell table:style-name="TableCellHeader" office:value-type="string">
            <text:p text:style-name="TableHeaderPara">Action</text:p>
          </table:table-cell>
          <table:table-cell table:style-name="TableCellHeader" office:value-type="string">
            <text:p text:style-name="TableHeaderPara">Owner</text:p>
          </table:table-cell>
          <table:table-cell table:style-name="TableCellHeader" office:value-type="string">
            <text:p text:style-name="TableHeaderPara">Sheets</text:p>
          </table:table-cell>
        </table:table-row>
        <table:table-row>
          <table:table-cell table:style-name="TableCell" office:value-type="string">
            <text:p text:style-name="TablePara">T2-1</text:p>
          </table:table-cell>
          <table:table-cell table:style-name="TableCell" office:value-type="string">
            <text:p text:style-name="TablePara">Fix ADAU1979 VREF buffer topology: move R410 (3kΩ) to ADA4807-1 output, not VREF pin input. Ensure ADA4807-1 DISABLE pin tied to V+.</text:p>
          </table:table-cell>
          <table:table-cell table:style-name="TableCell" office:value-type="string">
            <text:p text:style-name="TablePara">Precision</text:p>
          </table:table-cell>
          <table:table-cell table:style-name="TableCell" office:value-type="string">
            <text:p text:style-name="TablePara">adcs</text:p>
          </table:table-cell>
        </table:table-row>
        <table:table-row>
          <table:table-cell table:style-name="TableCell" office:value-type="string">
            <text:p text:style-name="TablePara">T2-2</text:p>
          </table:table-cell>
          <table:table-cell table:style-name="TableCell" office:value-type="string">
            <text:p text:style-name="TablePara">No action required: ADA4945-1 feedback caps (180pF, C343/C322/C319/C320/C340/C341/C344) are optional output-filter provisions, correctly DNP per datasheet (gain set by RF/RG resistor ratio; no Cf shown in any application circuit). Document this intent in a schematic note so future reviewers don't re-flag it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rx_driver_amps</text:p>
          </table:table-cell>
        </table:table-row>
        <table:table-row>
          <table:table-cell table:style-name="TableCell" office:value-type="string">
            <text:p text:style-name="TablePara">T2-3</text:p>
          </table:table-cell>
          <table:table-cell table:style-name="TableCell" office:value-type="string">
            <text:p text:style-name="TablePara">Add TX reconstruction filter at TX_RF+/TX_RF- output. Design 7-element differential LC Chebyshev with passband edge at ~300kHz, stopband at ~192kHz.</text:p>
          </table:table-cell>
          <table:table-cell table:style-name="TableCell" office:value-type="string">
            <text:p text:style-name="TablePara">RF/System</text:p>
          </table:table-cell>
          <table:table-cell table:style-name="TableCell" office:value-type="string">
            <text:p text:style-name="TablePara">tx_mixer</text:p>
            <text:p text:style-name="TablePara">nzif</text:p>
          </table:table-cell>
        </table:table-row>
        <table:table-row>
          <table:table-cell table:style-name="TableCell" office:value-type="string">
            <text:p text:style-name="TablePara">T2-4</text:p>
          </table:table-cell>
          <table:table-cell table:style-name="TableCell" office:value-type="string">
            <text:p text:style-name="TablePara">Confirm/add PLL1 loop filter cap (AD9523-1 pin 7, LF1_EXT_CAP) per datasheet recommendation. Drive EOH on VCXO to enable state. Terminate ZD_IN/ZD_IN_b.</text:p>
          </table:table-cell>
          <table:table-cell table:style-name="TableCell" office:value-type="string">
            <text:p text:style-name="TablePara">Clock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2-5</text:p>
          </table:table-cell>
          <table:table-cell table:style-name="TableCell" office:value-type="string">
            <text:p text:style-name="TablePara">Connect OSC_IN_b (AD9523-1 pin 10) to AC ground via 100nF cap for single-ended input mode.</text:p>
          </table:table-cell>
          <table:table-cell table:style-name="TableCell" office:value-type="string">
            <text:p text:style-name="TablePara">Clock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2-6</text:p>
          </table:table-cell>
          <table:table-cell table:style-name="TableCell" office:value-type="string">
            <text:p text:style-name="TablePara">Add frequency plan annotation table in clock_tree.kicad_sch: reference frequency, PLL1/PLL2 VCO frequencies, all divider settings, resulting output frequencies.</text:p>
          </table:table-cell>
          <table:table-cell table:style-name="TableCell" office:value-type="string">
            <text:p text:style-name="TablePara">Clock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2-7</text:p>
          </table:table-cell>
          <table:table-cell table:style-name="TableCell" office:value-type="string">
            <text:p text:style-name="TablePara">Confirm ADAU1467 SELFBOOT pin pulled high (IOVDD). Assign footprint to U502 (25AA1024 SPI EEPROM) — must appear in layout for self-boot.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dsp</text:p>
          </table:table-cell>
        </table:table-row>
        <table:table-row>
          <table:table-cell table:style-name="TableCell" office:value-type="string">
            <text:p text:style-name="TablePara">T2-8</text:p>
          </table:table-cell>
          <table:table-cell table:style-name="TableCell" office:value-type="string">
            <text:p text:style-name="TablePara">Fix 'MiSO_M' label (mixed case) → 'MISO_M' throughout dsp.kicad_sch. Run ERC to confirm zero label case conflicts.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dsp</text:p>
          </table:table-cell>
        </table:table-row>
        <table:table-row>
          <table:table-cell table:style-name="TableCell" office:value-type="string">
            <text:p text:style-name="TablePara">T2-9</text:p>
          </table:table-cell>
          <table:table-cell table:style-name="TableCell" office:value-type="string">
            <text:p text:style-name="TablePara">Add PGOOD pull-ups (100kΩ) on ADP2303 PGOOD pins. Define power sequencing: connect PGOOD outputs to downstream LDO EN pins or add sequencer IC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switching_reg</text:p>
            <text:p text:style-name="TablePara">power_ldos</text:p>
          </table:table-cell>
        </table:table-row>
        <table:table-row>
          <table:table-cell table:style-name="TableCell" office:value-type="string">
            <text:p text:style-name="TablePara">T2-10</text:p>
          </table:table-cell>
          <table:table-cell table:style-name="TableCell" office:value-type="string">
            <text:p text:style-name="TablePara">Replace 0402 footprint on C1215/C1216 (220µF) with appropriate electrolytic/tantalum footprint. Consider 470µF for fc ≈ 11Hz margin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</table:table-cell>
        </table:table-row>
        <table:table-row>
          <table:table-cell table:style-name="TableCell" office:value-type="string">
            <text:p text:style-name="TablePara">T2-11</text:p>
          </table:table-cell>
          <table:table-cell table:style-name="TableCell" office:value-type="string">
            <text:p text:style-name="TablePara">Drive ADA4945-1 VOCM pin from AVDD/2 resistor divider to match ADAU1979 common-mode input requirement (1.65V at 3.3V AVDD)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rx_driver_amps</text:p>
          </table:table-cell>
        </table:table-row>
        <table:table-row>
          <table:table-cell table:style-name="TableCell" office:value-type="string">
            <text:p text:style-name="TablePara">T2-12</text:p>
          </table:table-cell>
          <table:table-cell table:style-name="TableCell" office:value-type="string">
            <text:p text:style-name="TablePara">Resolve VCXO vs TCXO conflict (document in T1-6); update CLAUDE.md to match schematic component selection.</text:p>
          </table:table-cell>
          <table:table-cell table:style-name="TableCell" office:value-type="string">
            <text:p text:style-name="TablePara">System</text:p>
          </table:table-cell>
          <table:table-cell table:style-name="TableCell" office:value-type="string">
            <text:p text:style-name="TablePara">clock_tree</text:p>
          </table:table-cell>
        </table:table-row>
        <table:table-row>
          <table:table-cell table:style-name="TableCell" office:value-type="string">
            <text:p text:style-name="TablePara">T2-13</text:p>
          </table:table-cell>
          <table:table-cell table:style-name="TableCell" office:value-type="string">
            <text:p text:style-name="TablePara">Verify each of 17 ADAU1467 power pins has individual 100nF decoupling cap placed adjacent in layout.</text:p>
          </table:table-cell>
          <table:table-cell table:style-name="TableCell" office:value-type="string">
            <text:p text:style-name="TablePara">DSP</text:p>
          </table:table-cell>
          <table:table-cell table:style-name="TableCell" office:value-type="string">
            <text:p text:style-name="TablePara">dsp</text:p>
          </table:table-cell>
        </table:table-row>
        <table:table-row>
          <table:table-cell table:style-name="TableCell" office:value-type="string">
            <text:p text:style-name="TablePara">T2-14</text:p>
          </table:table-cell>
          <table:table-cell table:style-name="TableCell" office:value-type="string">
            <text:p text:style-name="TablePara">Standardise clock signal naming across all sheets (tx_phase_N vs CLK_N vs phase_N). Verify all hierarchical connections intact after rename.</text:p>
          </table:table-cell>
          <table:table-cell table:style-name="TableCell" office:value-type="string">
            <text:p text:style-name="TablePara">System</text:p>
          </table:table-cell>
          <table:table-cell table:style-name="TableCell" office:value-type="string">
            <text:p text:style-name="TablePara">tx_mixer</text:p>
            <text:p text:style-name="TablePara">clock_tree</text:p>
            <text:p text:style-name="TablePara">rx_mixer</text:p>
          </table:table-cell>
        </table:table-row>
        <table:table-row>
          <table:table-cell table:style-name="TableCell" office:value-type="string">
            <text:p text:style-name="TablePara">T2-15</text:p>
          </table:table-cell>
          <table:table-cell table:style-name="TableCell" office:value-type="string">
            <text:p text:style-name="TablePara">Verify Tx DAC differential polarity: trace each DAC_N+/DAC_N− to switch port; annotate polarity on tx_mixer schematic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tx_mixer</text:p>
          </table:table-cell>
        </table:table-row>
      </table:table>
      <text:p text:style-name="Body Text"/>
      <text:h text:outline-level="2" text:style-name="Heading 2">6.3 Tier 3 — Complete Before Final ERC Sign-Off</text:h>
      <table:table table:style-name="TableGrid">
        <table:table-column table:style-name="Col1.2cm"/>
        <table:table-column table:style-name="Col9.0cm"/>
        <table:table-column table:style-name="Col1.8cm"/>
        <table:table-column table:style-name="Col3.0cm"/>
        <table:table-row>
          <table:table-cell table:style-name="TableCellHeader" office:value-type="string">
            <text:p text:style-name="TableHeaderPara">#</text:p>
          </table:table-cell>
          <table:table-cell table:style-name="TableCellHeader" office:value-type="string">
            <text:p text:style-name="TableHeaderPara">Action</text:p>
          </table:table-cell>
          <table:table-cell table:style-name="TableCellHeader" office:value-type="string">
            <text:p text:style-name="TableHeaderPara">Owner</text:p>
          </table:table-cell>
          <table:table-cell table:style-name="TableCellHeader" office:value-type="string">
            <text:p text:style-name="TableHeaderPara">Sheets</text:p>
          </table:table-cell>
        </table:table-row>
        <table:table-row>
          <table:table-cell table:style-name="TableCell" office:value-type="string">
            <text:p text:style-name="TablePara">T3-1</text:p>
          </table:table-cell>
          <table:table-cell table:style-name="TableCell" office:value-type="string">
            <text:p text:style-name="TablePara">Assign all missing component footprints across all sheets. Priority: U401 (ADA4807-1), X701/ABLNO-VCXO, U704/U707 (SN74LVC8T245), C401/C403 (change to 0805 as per T2), all remaining passive footprints.</text:p>
          </table:table-cell>
          <table:table-cell table:style-name="TableCell" office:value-type="string">
            <text:p text:style-name="TablePara">All</text:p>
          </table:table-cell>
          <table:table-cell table:style-name="TableCell" office:value-type="string">
            <text:p text:style-name="TablePara">all sheets</text:p>
          </table:table-cell>
        </table:table-row>
        <table:table-row>
          <table:table-cell table:style-name="TableCell" office:value-type="string">
            <text:p text:style-name="TablePara">T3-2</text:p>
          </table:table-cell>
          <table:table-cell table:style-name="TableCell" office:value-type="string">
            <text:p text:style-name="TablePara">Add anti-aliasing caps (100–470pF C0G) across each AIN+/AIN− pair at ADAU1979 inputs. Remove DNP from C405/C406 per T1-11.</text:p>
          </table:table-cell>
          <table:table-cell table:style-name="TableCell" office:value-type="string">
            <text:p text:style-name="TablePara">Precision</text:p>
          </table:table-cell>
          <table:table-cell table:style-name="TableCell" office:value-type="string">
            <text:p text:style-name="TablePara">adcs</text:p>
          </table:table-cell>
        </table:table-row>
        <table:table-row>
          <table:table-cell table:style-name="TableCell" office:value-type="string">
            <text:p text:style-name="TablePara">T3-3</text:p>
          </table:table-cell>
          <table:table-cell table:style-name="TableCell" office:value-type="string">
            <text:p text:style-name="TablePara">Connect RINP/RINN/RAUX (ADAU1361 pins 12/13/14) to CM net instead of no_connect. Add pull to defined level on JACKDET/MICIN (pin 4)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</table:table-cell>
        </table:table-row>
        <table:table-row>
          <table:table-cell table:style-name="TableCell" office:value-type="string">
            <text:p text:style-name="TablePara">T3-4</text:p>
          </table:table-cell>
          <table:table-cell table:style-name="TableCell" office:value-type="string">
            <text:p text:style-name="TablePara">Add bulk bypass cap (10–47µF) on SSM2211S V+ supply (pin 6). Change C1212 from 0.47µF to 1µF (SSM2211S BYPASS pin recommendation)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</table:table-cell>
        </table:table-row>
        <table:table-row>
          <table:table-cell table:style-name="TableCell" office:value-type="string">
            <text:p text:style-name="TablePara">T3-5</text:p>
          </table:table-cell>
          <table:table-cell table:style-name="TableCell" office:value-type="string">
            <text:p text:style-name="TablePara">Add RF EMI filter caps (100pF C0G to GND) on all audio input traces at MIC_IN, Line_Input hierarchical label pins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</table:table-cell>
        </table:table-row>
        <table:table-row>
          <table:table-cell table:style-name="TableCell" office:value-type="string">
            <text:p text:style-name="TablePara">T3-6</text:p>
          </table:table-cell>
          <table:table-cell table:style-name="TableCell" office:value-type="string">
            <text:p text:style-name="TablePara">Add ADA4625-2 EP (pin 9) connection to V− supply rail in rx_mixer.kicad_sch for all 8 instances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rx_mixer</text:p>
          </table:table-cell>
        </table:table-row>
        <table:table-row>
          <table:table-cell table:style-name="TableCell" office:value-type="string">
            <text:p text:style-name="TablePara">T3-7</text:p>
          </table:table-cell>
          <table:table-cell table:style-name="TableCell" office:value-type="string">
            <text:p text:style-name="TablePara">Replace 10µF 0603 caps on +6.5V rail with 16V-rated 0805 parts in rx_mixer.kicad_sch.</text:p>
          </table:table-cell>
          <table:table-cell table:style-name="TableCell" office:value-type="string">
            <text:p text:style-name="TablePara">RF</text:p>
          </table:table-cell>
          <table:table-cell table:style-name="TableCell" office:value-type="string">
            <text:p text:style-name="TablePara">rx_mixer</text:p>
          </table:table-cell>
        </table:table-row>
        <table:table-row>
          <table:table-cell table:style-name="TableCell" office:value-type="string">
            <text:p text:style-name="TablePara">T3-8</text:p>
          </table:table-cell>
          <table:table-cell table:style-name="TableCell" office:value-type="string">
            <text:p text:style-name="TablePara">Add ferrite bead + 10µF cap between ADP2303 8V output and LT3045 input pins. Restore LDO PSRR advantage at 700kHz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ldos</text:p>
          </table:table-cell>
        </table:table-row>
        <table:table-row>
          <table:table-cell table:style-name="TableCell" office:value-type="string">
            <text:p text:style-name="TablePara">T3-9</text:p>
          </table:table-cell>
          <table:table-cell table:style-name="TableCell" office:value-type="string">
            <text:p text:style-name="TablePara">Complete Q501 USB_RESET circuit or document alternative; remove incomplete schematic note.</text:p>
          </table:table-cell>
          <table:table-cell table:style-name="TableCell" office:value-type="string">
            <text:p text:style-name="TablePara">uC</text:p>
          </table:table-cell>
          <table:table-cell table:style-name="TableCell" office:value-type="string">
            <text:p text:style-name="TablePara">microcontroller</text:p>
          </table:table-cell>
        </table:table-row>
        <table:table-row>
          <table:table-cell table:style-name="TableCell" office:value-type="string">
            <text:p text:style-name="TablePara">T3-10</text:p>
          </table:table-cell>
          <table:table-cell table:style-name="TableCell" office:value-type="string">
            <text:p text:style-name="TablePara">Resolve SWIO_0–3 destinations; annotate SWIO_VLOGIC source voltage; define pin purpose.</text:p>
          </table:table-cell>
          <table:table-cell table:style-name="TableCell" office:value-type="string">
            <text:p text:style-name="TablePara">uC</text:p>
          </table:table-cell>
          <table:table-cell table:style-name="TableCell" office:value-type="string">
            <text:p text:style-name="TablePara">microcontroller</text:p>
            <text:p text:style-name="TablePara">nzif</text:p>
          </table:table-cell>
        </table:table-row>
        <table:table-row>
          <table:table-cell table:style-name="TableCell" office:value-type="string">
            <text:p text:style-name="TablePara">T3-11</text:p>
          </table:table-cell>
          <table:table-cell table:style-name="TableCell" office:value-type="string">
            <text:p text:style-name="TablePara">Annotate ADAU1467 and ADAU1979 I2C addresses on respective sheets. Document I2S/TDM mode (TDM4 vs TDM8) and slot assignments for both ICs. Reference SigmaStudio project location.</text:p>
          </table:table-cell>
          <table:table-cell table:style-name="TableCell" office:value-type="string">
            <text:p text:style-name="TablePara">DSP</text:p>
            <text:p text:style-name="TablePara">Precision</text:p>
          </table:table-cell>
          <table:table-cell table:style-name="TableCell" office:value-type="string">
            <text:p text:style-name="TablePara">dsp</text:p>
            <text:p text:style-name="TablePara">adcs</text:p>
            <text:p text:style-name="TablePara">dacs</text:p>
          </table:table-cell>
        </table:table-row>
        <table:table-row>
          <table:table-cell table:style-name="TableCell" office:value-type="string">
            <text:p text:style-name="TablePara">T3-12</text:p>
          </table:table-cell>
          <table:table-cell table:style-name="TableCell" office:value-type="string">
            <text:p text:style-name="TablePara">Add AMP_SHUTDOWN pull-down to GND at source (microcontroller or top-level). SSM2211S must default to shutdown on power-up.</text:p>
          </table:table-cell>
          <table:table-cell table:style-name="TableCell" office:value-type="string">
            <text:p text:style-name="TablePara">Audio</text:p>
          </table:table-cell>
          <table:table-cell table:style-name="TableCell" office:value-type="string">
            <text:p text:style-name="TablePara">audio_subsystem</text:p>
            <text:p text:style-name="TablePara">microcontroller</text:p>
          </table:table-cell>
        </table:table-row>
        <table:table-row>
          <table:table-cell table:style-name="TableCell" office:value-type="string">
            <text:p text:style-name="TablePara">T3-13</text:p>
          </table:table-cell>
          <table:table-cell table:style-name="TableCell" office:value-type="string">
            <text:p text:style-name="TablePara">Confirm I2C pull-up resistors (2kΩ to IOVDD) exist at exactly one point in hierarchy for each I2C bus: ADAU1361, ADAU1467, ADAU1979, ADAU1962A, MCP23017.</text:p>
          </table:table-cell>
          <table:table-cell table:style-name="TableCell" office:value-type="string">
            <text:p text:style-name="TablePara">System</text:p>
          </table:table-cell>
          <table:table-cell table:style-name="TableCell" office:value-type="string">
            <text:p text:style-name="TablePara">all sheets</text:p>
          </table:table-cell>
        </table:table-row>
        <table:table-row>
          <table:table-cell table:style-name="TableCell" office:value-type="string">
            <text:p text:style-name="TablePara">T3-14</text:p>
          </table:table-cell>
          <table:table-cell table:style-name="TableCell" office:value-type="string">
            <text:p text:style-name="TablePara">Correct '04.7u' notation on LT3045 SET bypass caps to '470n' (unambiguous). Verify all LT3045 SET pin bypass caps are populated.</text:p>
          </table:table-cell>
          <table:table-cell table:style-name="TableCell" office:value-type="string">
            <text:p text:style-name="TablePara">Power</text:p>
          </table:table-cell>
          <table:table-cell table:style-name="TableCell" office:value-type="string">
            <text:p text:style-name="TablePara">power_ldos</text:p>
          </table:table-cell>
        </table:table-row>
        <table:table-row>
          <table:table-cell table:style-name="TableCell" office:value-type="string">
            <text:p text:style-name="TablePara">T3-15</text:p>
          </table:table-cell>
          <table:table-cell table:style-name="TableCell" office:value-type="string">
            <text:p text:style-name="TablePara">Run full ERC with zero errors and zero warnings as gate criterion for layout freeze.</text:p>
          </table:table-cell>
          <table:table-cell table:style-name="TableCell" office:value-type="string">
            <text:p text:style-name="TablePara">All</text:p>
          </table:table-cell>
          <table:table-cell table:style-name="TableCell" office:value-type="string">
            <text:p text:style-name="TablePara">all sheets</text:p>
          </table:table-cell>
        </table:table-row>
      </table:table>
      <text:p text:style-name="Body Text"/>
      <text:h text:outline-level="1" text:style-name="Heading 1">7. Theoretical Performance Analysis</text:h>
      <text:h text:outline-level="2" text:style-name="Heading 2">7.1 Receive Signal Chain — Dynamic Range Estimate</text:h>
      <text:p text:style-name="Body Text">All figures are theoretical estimates. Hardware bring-up measurements are required.</text:p>
      <text:p text:style-name="Body Text"><text:span text:style-name="Bold">Noise floor: </text:span>Mixer conversion loss ≈ 6 dB. ADA4625-2 contributes ≈ 2–3 dB NF. ADA4945-1 with Rf = 9.53kΩ contributes 12.6 nV/√Hz Johnson noise (dominant). Total estimated system NF = 6–9 dB.</text:p>
      <text:p text:style-name="Body Text"><text:span text:style-name="Bold">ADC chain dynamic range: </text:span>ADAU1979 full-scale = 4.5 Vrms differential. ADA4945-1 noise floor ≈ 3.1 µVrms (over 192kHz BW). Theoretical dynamic range ≈ 123 dB. Practical expectation: 110–115 dB (limited by ADC quantization + ADA4945-1 noise).</text:p>
      <text:p text:style-name="Body Text"><text:span text:style-name="Bold">Harmonic rejection (theoretical): </text:span>3rd LO harmonic: &gt;60 dB. 5th: &gt;50 dB. 7th: &gt;45 dB. Practical expectation for well-built board: 40–55 dB (limited by switch Rds(on) matching and phase-clock timing accuracy).</text:p>
      <text:p text:style-name="Body Text"><text:span text:style-name="Critical">Hold cap bandwidth note [CRITICAL DESIGN ISSUE]: </text:span>Current 100nF hold caps with N=8 phases produce ≈4 kHz baseband bandwidth. This limits the receiver to CW-only operation and is inconsistent with the stated ±96 kHz NCO range. Recalculate for N=8: C_hold ≈ 2 nF for ±200 kHz target BW.</text:p>
      <table:table table:style-name="TableGrid">
        <table:table-column table:style-name="Col4.0cm"/>
        <table:table-column table:style-name="Col4.0cm"/>
        <table:table-column table:style-name="Col4.0cm"/>
        <table:table-column table:style-name="Col5.0cm"/>
        <table:table-row>
          <table:table-cell table:style-name="TableCellHeader" office:value-type="string">
            <text:p text:style-name="TableHeaderPara">Metric</text:p>
          </table:table-cell>
          <table:table-cell table:style-name="TableCellHeader" office:value-type="string">
            <text:p text:style-name="TableHeaderPara">NZIF (estimated)</text:p>
          </table:table-cell>
          <table:table-cell table:style-name="TableCellHeader" office:value-type="string">
            <text:p text:style-name="TableHeaderPara">NC2030 (measured)</text:p>
          </table:table-cell>
          <table:table-cell table:style-name="TableCellHeader" office:value-type="string">
            <text:p text:style-name="TableHeaderPara">Notes</text:p>
          </table:table-cell>
        </table:table-row>
        <table:table-row>
          <table:table-cell table:style-name="TableCell" office:value-type="string">
            <text:p text:style-name="TablePara">System NF</text:p>
          </table:table-cell>
          <table:table-cell table:style-name="TableCell" office:value-type="string">
            <text:p text:style-name="TablePara">6–9 dB</text:p>
          </table:table-cell>
          <table:table-cell table:style-name="TableCell" office:value-type="string">
            <text:p text:style-name="TablePara">~12 dB</text:p>
          </table:table-cell>
          <table:table-cell table:style-name="TableCell" office:value-type="string">
            <text:p text:style-name="TablePara">NZIF: no on-board LNA; figures unverified</text:p>
          </table:table-cell>
        </table:table-row>
        <table:table-row>
          <table:table-cell table:style-name="TableCell" office:value-type="string">
            <text:p text:style-name="TablePara">System IIP3</text:p>
          </table:table-cell>
          <table:table-cell table:style-name="TableCell" office:value-type="string">
            <text:p text:style-name="TablePara">+25–35 dBm</text:p>
          </table:table-cell>
          <table:table-cell table:style-name="TableCell" office:value-type="string">
            <text:p text:style-name="TablePara">+28.5 dBm</text:p>
          </table:table-cell>
          <table:table-cell table:style-name="TableCell" office:value-type="string">
            <text:p text:style-name="TablePara">NZIF: SN74CBT3125 not characterised as RF mixer; must measure</text:p>
          </table:table-cell>
        </table:table-row>
        <table:table-row>
          <table:table-cell table:style-name="TableCell" office:value-type="string">
            <text:p text:style-name="TablePara">Harmonic rejection</text:p>
            <text:p text:style-name="TablePara">(3rd/5th/7th)</text:p>
          </table:table-cell>
          <table:table-cell table:style-name="TableCell" office:value-type="string">
            <text:p text:style-name="TablePara">40–55 dB (est.)</text:p>
          </table:table-cell>
          <table:table-cell table:style-name="TableCell" office:value-type="string">
            <text:p text:style-name="TablePara">&gt;45 dB (phasing)</text:p>
          </table:table-cell>
          <table:table-cell table:style-name="TableCell" office:value-type="string">
            <text:p text:style-name="TablePara">NZIF: phase-clock timing accuracy is limiting factor</text:p>
          </table:table-cell>
        </table:table-row>
        <table:table-row>
          <table:table-cell table:style-name="TableCell" office:value-type="string">
            <text:p text:style-name="TablePara">Instantaneous BW</text:p>
          </table:table-cell>
          <table:table-cell table:style-name="TableCell" office:value-type="string">
            <text:p text:style-name="TablePara">±96 kHz (target)</text:p>
            <text:p text:style-name="TablePara">≈4 kHz (current caps)</text:p>
          </table:table-cell>
          <table:table-cell table:style-name="TableCell" office:value-type="string">
            <text:p text:style-name="TablePara">~1.5 kHz</text:p>
          </table:table-cell>
          <table:table-cell table:style-name="TableCell" office:value-type="string">
            <text:p text:style-name="TablePara">NZIF hold caps must be changed to 2nF for target BW</text:p>
          </table:table-cell>
        </table:table-row>
        <table:table-row>
          <table:table-cell table:style-name="TableCell" office:value-type="string">
            <text:p text:style-name="TablePara">ADC SNR</text:p>
          </table:table-cell>
          <table:table-cell table:style-name="TableCell" office:value-type="string">
            <text:p text:style-name="TablePara">110–115 dB (192kHz)</text:p>
          </table:table-cell>
          <table:table-cell table:style-name="TableCell" office:value-type="string">
            <text:p text:style-name="TablePara">N/A</text:p>
          </table:table-cell>
          <table:table-cell table:style-name="TableCell" office:value-type="string">
            <text:p text:style-name="TablePara">ADAU1979 specification; supply quality critical</text:p>
          </table:table-cell>
        </table:table-row>
        <table:table-row>
          <table:table-cell table:style-name="TableCell" office:value-type="string">
            <text:p text:style-name="TablePara">DAC THD+N</text:p>
          </table:table-cell>
          <table:table-cell table:style-name="TableCell" office:value-type="string">
            <text:p text:style-name="TablePara">&lt;0.005% (target)</text:p>
          </table:table-cell>
          <table:table-cell table:style-name="TableCell" office:value-type="string">
            <text:p text:style-name="TablePara">N/A</text:p>
          </table:table-cell>
          <table:table-cell table:style-name="TableCell" office:value-type="string">
            <text:p text:style-name="TablePara">ADAU1962A spec; degraded by Q601 unregulated AVDD</text:p>
          </table:table-cell>
        </table:table-row>
        <table:table-row>
          <table:table-cell table:style-name="TableCell" office:value-type="string">
            <text:p text:style-name="TablePara">MDS at ±96kHz BW</text:p>
          </table:table-cell>
          <table:table-cell table:style-name="TableCell" office:value-type="string">
            <text:p text:style-name="TablePara">~−115 dBm (est.)</text:p>
          </table:table-cell>
          <table:table-cell table:style-name="TableCell" office:value-type="string">
            <text:p text:style-name="TablePara">−135 dBm</text:p>
            <text:p text:style-name="TablePara">@ 500Hz BW</text:p>
          </table:table-cell>
          <table:table-cell table:style-name="TableCell" office:value-type="string">
            <text:p text:style-name="TablePara">Bandwidth-corrected comparison: NZIF ~−109 dBm equivalent</text:p>
          </table:table-cell>
        </table:table-row>
      </table:table>
      <text:p text:style-name="Body Text"/>
      <text:h text:outline-level="1" text:style-name="Heading 1">8. Path to QST Publication</text:h>
      <text:h text:outline-level="2" text:style-name="Heading 2">8.1 What Would Impress QST Reviewers</text:h>
      <text:p text:style-name="Body Text">• 8-phase polyphase commutating mixer: novel at amateur level, directly extending Tayloe's 4-phase detector (QEX May 2001) to 8-phase with harmonic rejection to the 7th LO harmonic. Phasor mathematics and LTspice simulation are publication-ready.</text:p>
      <text:p text:style-name="Body Text">• AD9523-1 dual-output clock architecture: LO tuning without disturbing the audio clock domain is a non-trivial insight not seen in amateur SDR designs.</text:p>
      <text:p text:style-name="Body Text">• SN74AUC16374 ring counter phase generation: elegant, reproducible single-bit shift register producing eight non-overlapping phases from a high-speed clock.</text:p>
      <text:p text:style-name="Body Text">• Fully differential signal flow through LT5400 matched-quad resistors for I/Q amplitude balance.</text:p>
      <text:p text:style-name="Body Text">• Weaver two-stage demodulation: first stage in analog 8-phase mixer, second stage in ADAU1467 digital NCO — clean and technically rigorous.</text:p>
      <text:p text:style-name="Body Text">• I/Q calibration via directional coupler calibration tap: more sophisticated than any published amateur receiver design.</text:p>
      <text:p text:style-name="Body Text">• LT3045/LT3094 power architecture: 2 µVrms noise floor, domain-isolated rails — publishable design decision that most commercial SDR kits skip.</text:p>
      <text:p text:style-name="Body Text">• ZWAS quasi-elliptic LPF bank serving dual TX/RX purpose: the trap that rejects the 2nd PA harmonic on transmit is the same trap that notches the adjacent amateur band on receive.</text:p>
      <text:h text:outline-level="2" text:style-name="Heading 2">8.2 What Would Concern QST Reviewers</text:h>
      <text:p text:style-name="Body Text">• TX reconstruction filter absent: transmitter cannot demonstrate Part 97 compliance. Mandatory before any submission.</text:p>
      <text:p text:style-name="Body Text">• No measured performance data: all figures are theoretical estimates. QST requires bench-measured MDS, IIP3, harmonic rejection, and image rejection.</text:p>
      <text:p text:style-name="Body Text">• 8 critical schematic errors: any one would prevent a built board from functioning. Schematics must be ERC-clean before submission.</text:p>
      <text:p text:style-name="Body Text">• Hold capacitor design error (N=8 vs N=1): ≈4 kHz bandwidth vs stated ±96 kHz. A reviewer will check this calculation.</text:p>
      <text:p text:style-name="Body Text">• ADAU1467 is a 300-ball BGA: home construction requires professional PCB assembly. Note assembly requirements clearly.</text:p>
      <text:p text:style-name="Body Text">• SigmaStudio proprietary toolchain: reviewer may ask whether design is replicable without purchasing SigmaStudio license. Provide .dspproj file.</text:p>
      <text:p text:style-name="Body Text">• 6m 4-phase spurious response to 30m signals: must be quantified and disclosed in article.</text:p>
      <text:p text:style-name="Body Text">• Power supply bring-up risk (LDOs oscillate due to insufficient output capacitance, switcher feedback values wrong) means average builder may not diagnose failures.</text:p>
      <text:h text:outline-level="2" text:style-name="Heading 2">8.3 Minimum Viable Path to Submission</text:h>
      <text:p text:style-name="Body Text">• Step 1: Week 1: Complete all Tier 1 critical schematic fixes (T1-1 through T1-9).</text:p>
      <text:p text:style-name="Body Text">• Step 2: Week 2: Complete Tier 2 items, particularly TX reconstruction filter design (T2-3) and AD9523-1 configuration (T2-4–T2-6).</text:p>
      <text:p text:style-name="Body Text">• Step 3: Week 3: Assign all footprints, run ERC to zero errors, freeze schematic for layout.</text:p>
      <text:p text:style-name="Body Text">• Step 4: Layout: Length-match all phase_0...phase_315 traces. Isolate clock tree from baseband. Follow LT3045 layout guidelines for output cap placement.</text:p>
      <text:p text:style-name="Body Text">• Step 5: Bring-up: Measure and document: (1) All supply rail voltages with oscilloscope for LDO stability, (2) AD9523-1 lock status, (3) ADAU1979 and ADAU1962A I2C communication, (4) ADAU1467 program load verification.</text:p>
      <text:p text:style-name="Body Text">• Step 6: Performance measurements: MDS (Y-factor or noise source comparison), two-tone IIP3, harmonic rejection at f_LO/3, f_LO/5, f_LO/7, image rejection, TX spectrum (with reconstruction filter).</text:p>
      <text:p text:style-name="Body Text">• Step 7: Submission: Corrected ERC-clean schematic, SigmaStudio project file, AD9523-1 register dump, measured performance data table, Pico firmware source.</text:p>
      <text:p text:style-name="Body Text"/>
      <text:p text:style-name="Footer">NZIF Radio Schematic Review — Generated 2026-06-07 (corrected) | Reviewers: HF Architecture, RF Mixer, Clock Tree, Power/Audio, Precision Analog, Audio Subsystem | Status: HOLD — 8 Critical items block layout freez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Heading_20_1" style:family="paragraph" style:parent-style-name="Heading 1" style:display-name="Heading 1">
      <style:text-properties fo:font-size="16pt" fo:font-weight="bold" fo:color="#1F4E79"/>
      <style:paragraph-properties fo:margin-top="12pt" fo:margin-bottom="4pt"/>
    </style:style>
    <style:style style:name="Heading_20_2" style:family="paragraph" style:parent-style-name="Heading 2" style:display-name="Heading 2">
      <style:text-properties fo:font-size="13pt" fo:font-weight="bold" fo:color="#2E75B6"/>
      <style:paragraph-properties fo:margin-top="10pt" fo:margin-bottom="3pt"/>
    </style:style>
    <style:style style:name="Heading_20_3" style:family="paragraph" style:parent-style-name="Heading 3" style:display-name="Heading 3">
      <style:text-properties fo:font-size="11pt" fo:font-weight="bold" fo:color="#404040"/>
      <style:paragraph-properties fo:margin-top="8pt" fo:margin-bottom="2pt"/>
    </style:style>
    <style:style style:name="Body_20_Text" style:family="paragraph" style:display-name="Body Text">
      <style:text-properties fo:font-size="10pt"/>
      <style:paragraph-properties fo:margin-top="3pt" fo:margin-bottom="3pt"/>
    </style:style>
    <style:style style:name="Critical" style:family="text" style:display-name="Critical">
      <style:text-properties fo:font-weight="bold" fo:color="#C00000"/>
    </style:style>
    <style:style style:name="High" style:family="text" style:display-name="High">
      <style:text-properties fo:font-weight="bold" fo:color="#FF8C00"/>
    </style:style>
    <style:style style:name="New" style:family="text" style:display-name="New">
      <style:text-properties fo:font-weight="bold" fo:color="#7030A0"/>
    </style:style>
    <style:style style:name="Resolved" style:family="text" style:display-name="Resolved">
      <style:text-properties fo:color="#375623"/>
    </style:style>
    <style:style style:name="Bold" style:family="text" style:display-name="Bold">
      <style:text-properties fo:font-weight="bold"/>
    </style:style>
    <style:style style:name="Code" style:family="text" style:display-name="Code">
      <style:text-properties fo:font-family="Courier New" fo:font-size="9pt"/>
    </style:style>
    <style:style style:name="TablePara" style:family="paragraph" style:display-name="TablePara">
      <style:text-properties fo:font-size="9pt"/>
      <style:paragraph-properties fo:margin-top="1pt" fo:margin-bottom="1pt"/>
    </style:style>
    <style:style style:name="TableHeaderPara" style:family="paragraph" style:display-name="TableHeaderPara">
      <style:text-properties fo:font-size="9pt" fo:font-weight="bold" fo:color="#FFFFFF"/>
      <style:paragraph-properties fo:margin-top="1pt" fo:margin-bottom="1pt"/>
    </style:style>
    <style:style style:name="Title" style:family="paragraph" style:display-name="Title">
      <style:text-properties fo:font-size="20pt" fo:font-weight="bold" fo:color="#1F4E79"/>
      <style:paragraph-properties fo:margin-top="0pt" fo:margin-bottom="6pt"/>
    </style:style>
    <style:style style:name="Subtitle" style:family="paragraph" style:display-name="Subtitle">
      <style:text-properties fo:font-size="12pt" fo:color="#404040"/>
      <style:paragraph-properties fo:margin-top="0pt" fo:margin-bottom="12pt"/>
    </style:style>
    <style:style style:name="Footer" style:family="paragraph" style:display-name="Footer">
      <style:text-properties fo:font-size="8pt" fo:color="#80808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